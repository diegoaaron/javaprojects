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7000000C208948482.jpg" manifest:media-type="image/jpeg"/>
  <manifest:file-entry manifest:full-path="Pictures/10000000000002D300000189D95F240A.jpg" manifest:media-type="image/jpeg"/>
  <manifest:file-entry manifest:full-path="Pictures/10000000000002D90000011A676C4DB9.jpg" manifest:media-type="image/jpeg"/>
  <manifest:file-entry manifest:full-path="Pictures/10000000000002D600000166342A734B.jpg" manifest:media-type="image/jpeg"/>
  <manifest:file-entry manifest:full-path="Pictures/10000000000002D600000147A3F77104.jpg" manifest:media-type="image/jpeg"/>
  <manifest:file-entry manifest:full-path="Pictures/10000000000002D6000001043ADE618B.jpg" manifest:media-type="image/jpeg"/>
  <manifest:file-entry manifest:full-path="Pictures/10000000000002D20000017B6E3122AC.jpg" manifest:media-type="image/jpeg"/>
  <manifest:file-entry manifest:full-path="Pictures/10000000000002DA000001E2C284D432.jpg" manifest:media-type="image/jpeg"/>
  <manifest:file-entry manifest:full-path="Pictures/10000000000002D500000181D5F44A66.jpg" manifest:media-type="image/jpeg"/>
  <manifest:file-entry manifest:full-path="Pictures/10000000000002D9000000ED9524735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7f9da2" officeooo:paragraph-rsid="007f9da2" style:font-size-asian="10pt" style:font-size-complex="10pt"/>
    </style:style>
    <style:style style:name="P2" style:family="paragraph" style:parent-style-name="Standard">
      <style:text-properties fo:font-size="10pt" officeooo:rsid="0091980a" officeooo:paragraph-rsid="00934f73" style:font-size-asian="10pt" style:font-size-complex="10pt"/>
    </style:style>
    <style:style style:name="P3" style:family="paragraph" style:parent-style-name="Standard">
      <style:text-properties officeooo:rsid="0097975d" officeooo:paragraph-rsid="0097975d"/>
    </style:style>
    <style:style style:name="P4" style:family="paragraph" style:parent-style-name="Standard">
      <style:text-properties officeooo:rsid="0097975d" officeooo:paragraph-rsid="00984951"/>
    </style:style>
    <style:style style:name="P5" style:family="paragraph" style:parent-style-name="Standard">
      <style:text-properties officeooo:rsid="0097975d" officeooo:paragraph-rsid="009d739b"/>
    </style:style>
    <style:style style:name="P6" style:family="paragraph" style:parent-style-name="Standard" style:list-style-name="L1">
      <style:text-properties officeooo:rsid="0097975d" officeooo:paragraph-rsid="0097975d"/>
    </style:style>
    <style:style style:name="P7" style:family="paragraph" style:parent-style-name="Standard">
      <style:text-properties officeooo:rsid="0097975d" officeooo:paragraph-rsid="00a62faf"/>
    </style:style>
    <style:style style:name="P8" style:family="paragraph" style:parent-style-name="Standard">
      <style:text-properties officeooo:rsid="0097975d" officeooo:paragraph-rsid="00a86c80"/>
    </style:style>
    <style:style style:name="P9" style:family="paragraph" style:parent-style-name="Standard" style:list-style-name="L2">
      <style:text-properties officeooo:rsid="0097975d" officeooo:paragraph-rsid="0097975d"/>
    </style:style>
    <style:style style:name="P10" style:family="paragraph" style:parent-style-name="Standard">
      <style:text-properties officeooo:rsid="0097975d" officeooo:paragraph-rsid="00b15f38"/>
    </style:style>
    <style:style style:name="P11" style:family="paragraph" style:parent-style-name="Standard">
      <style:text-properties fo:font-weight="bold" officeooo:rsid="00984951" officeooo:paragraph-rsid="00984951" style:font-weight-asian="bold" style:font-weight-complex="bold"/>
    </style:style>
    <style:style style:name="P12" style:family="paragraph" style:parent-style-name="Standard">
      <style:text-properties fo:font-size="10pt" officeooo:rsid="0091980a" officeooo:paragraph-rsid="00984951" style:font-size-asian="10pt" style:font-size-complex="10pt"/>
    </style:style>
    <style:style style:name="P13" style:family="paragraph" style:parent-style-name="Standard">
      <style:text-properties fo:font-size="10pt" officeooo:rsid="0097975d" officeooo:paragraph-rsid="0097975d" style:font-size-asian="10pt" style:font-size-complex="10pt"/>
    </style:style>
    <style:style style:name="P14" style:family="paragraph" style:parent-style-name="Standard">
      <style:text-properties fo:font-size="10pt" officeooo:rsid="0097975d" officeooo:paragraph-rsid="00984951" style:font-size-asian="10pt" style:font-size-complex="10pt"/>
    </style:style>
    <style:style style:name="P15" style:family="paragraph" style:parent-style-name="Standard">
      <style:text-properties fo:font-style="italic" fo:font-weight="bold" officeooo:rsid="0097975d" officeooo:paragraph-rsid="0097975d" style:font-style-asian="italic" style:font-weight-asian="bold" style:font-style-complex="italic" style:font-weight-complex="bold"/>
    </style:style>
    <style:style style:name="P16" style:family="paragraph" style:parent-style-name="Standard" style:list-style-name="L1">
      <style:text-properties fo:font-style="italic" fo:font-weight="bold" officeooo:rsid="0097975d" officeooo:paragraph-rsid="0097975d" style:font-style-asian="italic" style:font-weight-asian="bold" style:font-style-complex="italic" style:font-weight-complex="bold"/>
    </style:style>
    <style:style style:name="P17" style:family="paragraph" style:parent-style-name="Standard">
      <style:text-properties fo:font-size="12pt" fo:font-style="normal" fo:font-weight="bold" officeooo:rsid="0097975d" officeooo:paragraph-rsid="0097975d" style:font-size-asian="12pt" style:font-style-asian="normal" style:font-weight-asian="bold" style:font-size-complex="12pt" style:font-style-complex="normal" style:font-weight-complex="bold"/>
    </style:style>
    <style:style style:name="P18" style:family="paragraph" style:parent-style-name="Standard">
      <style:text-properties officeooo:rsid="00a9f3af" officeooo:paragraph-rsid="00a9f3af"/>
    </style:style>
    <style:style style:name="P19" style:family="paragraph" style:parent-style-name="Standard">
      <style:text-properties officeooo:rsid="00ab5df4" officeooo:paragraph-rsid="00ab5df4"/>
    </style:style>
    <style:style style:name="P20" style:family="paragraph" style:parent-style-name="Standard">
      <style:text-properties officeooo:rsid="00ad92e8" officeooo:paragraph-rsid="00ad92e8"/>
    </style:style>
    <style:style style:name="P21" style:family="paragraph" style:parent-style-name="Text_20_body">
      <style:text-properties fo:font-size="10pt" officeooo:rsid="0097975d" officeooo:paragraph-rsid="0097975d" style:font-size-asian="10pt" style:font-size-complex="10pt"/>
    </style:style>
    <style:style style:name="P22" style:family="paragraph">
      <style:text-properties style:font-name="F" fo:font-size="10pt" style:font-size-complex="10pt"/>
    </style:style>
    <style:style style:name="P23" style:family="paragraph">
      <style:text-properties style:font-name="F" fo:font-size="12pt"/>
    </style:style>
    <style:style style:name="P24" style:family="paragraph">
      <loext:graphic-properties draw:fill="solid" draw:fill-color="#f8f8f8"/>
      <style:text-properties style:font-name="F"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a3f241"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officeooo:rsid="009c13bb" style:font-size-asian="10pt" style:font-size-complex="10pt"/>
    </style:style>
    <style:style style:name="T7" style:family="text">
      <style:text-properties fo:font-size="10pt" officeooo:rsid="009d739b" style:font-size-asian="10pt" style:font-size-complex="10pt"/>
    </style:style>
    <style:style style:name="T8" style:family="text">
      <style:text-properties fo:font-size="10pt" officeooo:rsid="00a3f241" style:font-size-asian="10pt" style:font-size-complex="10pt"/>
    </style:style>
    <style:style style:name="T9" style:family="text">
      <style:text-properties fo:font-size="10pt" officeooo:rsid="00a62faf" style:font-size-asian="10pt" style:font-size-complex="10pt"/>
    </style:style>
    <style:style style:name="T10" style:family="text">
      <style:text-properties fo:font-size="10pt" officeooo:rsid="00a75242" style:font-size-asian="10pt" style:font-size-complex="10pt"/>
    </style:style>
    <style:style style:name="T11" style:family="text">
      <style:text-properties fo:font-size="10pt" officeooo:rsid="00a86c80" style:font-size-asian="10pt" style:font-size-complex="10pt"/>
    </style:style>
    <style:style style:name="T12" style:family="text">
      <style:text-properties fo:font-size="10pt" officeooo:rsid="0097975d" style:font-size-asian="10pt" style:font-size-complex="10pt"/>
    </style:style>
    <style:style style:name="T13" style:family="text">
      <style:text-properties fo:font-size="10pt" officeooo:rsid="00b03bd8" style:font-size-asian="10pt" style:font-size-complex="10pt"/>
    </style:style>
    <style:style style:name="T14" style:family="text">
      <style:text-properties fo:font-size="10pt" officeooo:rsid="00b15f38"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ab5df4" style:font-size-asian="10pt" style:font-weight-asian="bold" style:font-size-complex="10pt" style:font-weight-complex="bold"/>
    </style:style>
    <style:style style:name="T17" style:family="text">
      <style:text-properties fo:font-size="10pt" fo:font-weight="bold" officeooo:rsid="00ad46b0" style:font-size-asian="10pt" style:font-weight-asian="bold" style:font-size-complex="10pt" style:font-weight-complex="bold"/>
    </style:style>
    <style:style style:name="T18" style:family="text">
      <style:text-properties fo:font-size="10pt" fo:font-weight="bold" officeooo:rsid="00b03bd8" style:font-size-asian="10pt" style:font-weight-asian="bold" style:font-size-complex="10pt" style:font-weight-complex="bold"/>
    </style:style>
    <style:style style:name="T19" style:family="text">
      <style:text-properties fo:font-size="10pt" fo:font-weight="bold" officeooo:rsid="00b15f38" style:font-size-asian="10pt" style:font-weight-asian="bold" style:font-size-complex="10pt" style:font-weight-complex="bold"/>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0pt" fo:font-style="italic" fo:font-weight="bold" officeooo:rsid="00a62faf" style:font-size-asian="10pt" style:font-style-asian="italic" style:font-weight-asian="bold" style:font-size-complex="10pt" style:font-style-complex="italic" style:font-weight-complex="bold"/>
    </style:style>
    <style:style style:name="T22" style:family="text">
      <style:text-properties fo:font-size="10pt" fo:font-style="italic" fo:font-weight="bold" officeooo:rsid="00a86c80" style:font-size-asian="10pt" style:font-style-asian="italic" style:font-weight-asian="bold" style:font-size-complex="10pt" style:font-style-complex="italic" style:font-weight-complex="bold"/>
    </style:style>
    <style:style style:name="T23" style:family="text">
      <style:text-properties fo:font-size="10pt" fo:font-style="italic" fo:font-weight="bold" officeooo:rsid="00ad46b0" style:font-size-asian="10pt" style:font-style-asian="italic" style:font-weight-asian="bold" style:font-size-complex="10pt" style:font-style-complex="italic" style:font-weight-complex="bold"/>
    </style:style>
    <style:style style:name="T24" style:family="text">
      <style:text-properties fo:font-size="10pt" fo:font-style="italic" fo:font-weight="bold" officeooo:rsid="0097975d" style:font-size-asian="10pt" style:font-style-asian="italic" style:font-weight-asian="bold" style:font-size-complex="10pt" style:font-style-complex="italic" style:font-weight-complex="bold"/>
    </style:style>
    <style:style style:name="T25" style:family="text">
      <style:text-properties fo:font-size="10pt" fo:font-style="italic" fo:font-weight="bold" officeooo:rsid="00b03bd8" style:font-size-asian="10pt" style:font-style-asian="italic" style:font-weight-asian="bold" style:font-size-complex="10pt" style:font-style-complex="italic" style:font-weight-complex="bold"/>
    </style:style>
    <style:style style:name="T26" style:family="text">
      <style:text-properties fo:font-size="10pt" fo:font-style="italic" fo:font-weight="bold" officeooo:rsid="00b15f38" style:font-size-asian="10pt" style:font-style-asian="italic" style:font-weight-asian="bold" style:font-size-complex="10pt" style:font-style-complex="italic" style:font-weight-complex="bold"/>
    </style:style>
    <style:style style:name="T27" style:family="text">
      <style:text-properties fo:font-size="10pt" fo:font-style="normal" fo:font-weight="normal" officeooo:rsid="00a62faf" style:font-size-asian="10pt" style:font-style-asian="normal" style:font-weight-asian="normal" style:font-size-complex="10pt" style:font-style-complex="normal" style:font-weight-complex="normal"/>
    </style:style>
    <style:style style:name="T28" style:family="text">
      <style:text-properties fo:font-size="10pt" fo:font-style="normal" fo:font-weight="bold" style:font-size-asian="10pt" style:font-style-asian="normal" style:font-weight-asian="bold" style:font-size-complex="10pt" style:font-style-complex="normal" style:font-weight-complex="bold"/>
    </style:style>
    <style:style style:name="T29" style:family="text">
      <style:text-properties officeooo:rsid="00984951"/>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9d739b" style:font-size-asian="12pt" style:font-weight-asian="bold" style:font-size-complex="12pt" style:font-weight-complex="bold"/>
    </style:style>
    <style:style style:name="T32" style:family="text">
      <style:text-properties fo:font-size="12pt" fo:font-weight="bold" officeooo:rsid="00a62faf" style:font-size-asian="12pt" style:font-weight-asian="bold" style:font-size-complex="12pt" style:font-weight-complex="bold"/>
    </style:style>
    <style:style style:name="T33" style:family="text">
      <style:text-properties fo:font-size="12pt" fo:font-weight="bold" officeooo:rsid="00ad92e8" style:font-size-asian="12pt" style:font-weight-asian="bold" style:font-size-complex="12pt" style:font-weight-complex="bold"/>
    </style:style>
    <style:style style:name="T34" style:family="text">
      <style:text-properties fo:font-size="12pt" fo:font-weight="bold" officeooo:rsid="00ae19d0" style:font-size-asian="12pt" style:font-weight-asian="bold" style:font-size-complex="12pt" style:font-weight-complex="bold"/>
    </style:style>
    <style:style style:name="T35" style:family="text">
      <style:text-properties fo:font-size="12pt" fo:font-weight="bold" officeooo:rsid="00b15f38" style:font-size-asian="12pt" style:font-weight-asian="bold" style:font-size-complex="12pt" style:font-weight-complex="bold"/>
    </style:style>
    <style:style style:name="T36" style:family="text">
      <style:text-properties fo:font-size="12pt" fo:font-style="italic" fo:font-weight="bold" officeooo:rsid="00a62faf" style:font-size-asian="12pt" style:font-style-asian="italic" style:font-weight-asian="bold" style:font-size-complex="12pt" style:font-style-complex="italic" style:font-weight-complex="bold"/>
    </style:style>
    <style:style style:name="T37" style:family="text">
      <style:text-properties fo:font-size="12pt" fo:font-style="italic" fo:font-weight="bold" officeooo:rsid="00b03bd8" style:font-size-asian="12pt" style:font-style-asian="italic" style:font-weight-asian="bold" style:font-size-complex="12pt" style:font-style-complex="italic" style:font-weight-complex="bold"/>
    </style:style>
    <style:style style:name="T38" style:family="text">
      <style:text-properties fo:font-size="12pt" fo:font-style="italic" fo:font-weight="bold" officeooo:rsid="00b15f38" style:font-size-asian="12pt" style:font-style-asian="italic" style:font-weight-asian="bold" style:font-size-complex="12pt" style:font-style-complex="italic" style:font-weight-complex="bold"/>
    </style:style>
    <style:style style:name="T39" style:family="text">
      <style:text-properties fo:font-size="12pt" fo:font-style="normal" fo:font-weight="bold" style:font-size-asian="12pt" style:font-style-asian="normal" style:font-weight-asian="bold" style:font-size-complex="12pt" style:font-style-complex="normal" style:font-weight-complex="bold"/>
    </style:style>
    <style:style style:name="T40" style:family="text">
      <style:text-properties officeooo:rsid="00a3f241"/>
    </style:style>
    <style:style style:name="T41" style:family="text">
      <style:text-properties officeooo:rsid="00a54b7c"/>
    </style:style>
    <style:style style:name="T42" style:family="text">
      <style:text-properties officeooo:rsid="00a62faf"/>
    </style:style>
    <style:style style:name="T4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44"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45"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46"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47"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48"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49"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50" style:family="text">
      <style:text-properties fo:color="#f57900" loext:opacity="100%" style:font-name="Liberation Serif" fo:font-size="10pt" fo:language="zxx" fo:country="none" fo:font-style="normal" style:text-underline-style="none" fo:font-weight="normal" fo:background-color="transparent" style:font-size-asian="10pt" style:font-size-complex="10pt"/>
    </style:style>
    <style:style style:name="T51"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52"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53"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54" style:family="text">
      <style:text-properties fo:color="#8f5902" loext:opacity="100%" style:font-name="Liberation Serif" fo:font-size="10pt" fo:language="zxx" fo:country="none" style:text-underline-style="none" fo:font-weight="normal" fo:background-color="transparent" style:font-size-asian="10pt" style:font-size-complex="10pt"/>
    </style:style>
    <style:style style:name="T5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font-style-complex="italic" style:font-weight-complex="bold"/>
    </style:style>
    <style:style style:name="T56"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2.3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9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85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omando decisiones</text:p>
      <text:p text:style-name="P1"/>
      <text:p text:style-name="P4"><text:s/><text:span text:style-name="T1">sentencia </text:span><text:span text:style-name="T4">IF</text:span></text:p>
      <text:p text:style-name="P14"/>
      <text:p text:style-name="P14"><text:span text:style-name="T29">E</text:span>l objetivo de una instrucción de toma de decisiones puede ser una sola instrucción o un bloque de instrucciones.</text:p>
      <text:p text:style-name="P14"/>
      <text:p text:style-name="P12"><draw:frame draw:style-name="fr2" draw:name="Imagen1" text:anchor-type="char" svg:width="8.985cm" svg:height="2.921cm" draw:z-index="1"><draw:image xlink:href="Pictures/10000000000002D9000000ED9524735D.jpg" xlink:type="simple" xlink:show="embed" xlink:actuate="onLoad" draw:mime-type="image/jpeg"/></draw:frame></text:p>
      <text:p text:style-name="P2"><draw:frame text:anchor-type="paragraph" draw:z-index="0" draw:name="Marco de texto 3" draw:style-name="gr1" draw:text-style-name="P24" svg:width="12.415cm" svg:height="3.248cm" svg:x="0.43cm" svg:y="0.155cm"><draw:text-box><text:p text:style-name="P22"><text:span text:style-name="T43">1 <text:s/></text:span><text:span text:style-name="T52">// sentencia de una sola linea cuando solo hay una ejecución después del IF</text:span></text:p><text:p text:style-name="P22"><text:span text:style-name="T43">2 <text:s/></text:span><text:span text:style-name="T44">if</text:span><text:span text:style-name="T45"> </text:span><text:span text:style-name="T49">(</text:span><text:span text:style-name="T46">a</text:span><text:span text:style-name="T45"> </text:span><text:span text:style-name="T47">&gt;</text:span><text:span text:style-name="T45"> </text:span><text:span text:style-name="T46">b</text:span><text:span text:style-name="T49">)</text:span></text:p><text:p text:style-name="P22"><text:span text:style-name="T43">3 <text:s/></text:span><text:span text:style-name="T45"><text:s/></text:span><text:span text:style-name="T46">a</text:span><text:span text:style-name="T47">++</text:span><text:span text:style-name="T49">;</text:span></text:p><text:p text:style-name="P23"><text:span text:style-name="T43">4 <text:s/></text:span></text:p><text:p text:style-name="P22"><text:span text:style-name="T43">5 <text:s/></text:span><text:span text:style-name="T52">// sentencia de múltiples lineas, cuando queremos hacer mas de una sentencia</text:span></text:p><text:p text:style-name="P22"><text:span text:style-name="T43">6 <text:s/></text:span><text:span text:style-name="T44">if</text:span><text:span text:style-name="T45"> </text:span><text:span text:style-name="T49">(</text:span><text:span text:style-name="T46">a</text:span><text:span text:style-name="T45"> </text:span><text:span text:style-name="T47">&gt;</text:span><text:span text:style-name="T45"> </text:span><text:span text:style-name="T48">3</text:span><text:span text:style-name="T49">){</text:span></text:p><text:p text:style-name="P22"><text:span text:style-name="T43">7 <text:s/></text:span><text:span text:style-name="T45"><text:s/></text:span><text:span text:style-name="T46">a</text:span><text:span text:style-name="T47">++</text:span><text:span text:style-name="T49">;</text:span></text:p><text:p text:style-name="P22"><text:span text:style-name="T43">8 <text:s/></text:span><text:span text:style-name="T49">}</text:span></text:p></draw:text-box></draw:frame></text:p>
      <text:p text:style-name="P3"><text:span text:style-name="T5">la sentencia </text:span><text:span text:style-name="T20">IF-ELSE</text:span><text:span text:style-name="T5"> es utilizada para evitar tener que hacer 2 IF</text:span></text:p>
      <text:p text:style-name="P3"><text:span text:style-name="T5"/></text:p>
      <text:p text:style-name="P3"><draw:frame draw:style-name="fr2" draw:name="Imagen2" text:anchor-type="char" svg:width="6.791cm" svg:height="3.607cm" draw:z-index="2"><draw:image xlink:href="Pictures/10000000000002D500000181D5F44A66.jpg" xlink:type="simple" xlink:show="embed" xlink:actuate="onLoad" draw:mime-type="image/jpeg"/></draw:frame><text:span text:style-name="T5"/></text:p>
      <text:p text:style-name="P3"><draw:frame text:anchor-type="paragraph" draw:z-index="3" draw:name="Marco de texto 1" draw:style-name="gr1" draw:text-style-name="P24" svg:width="12.415cm" svg:height="1.389cm" svg:x="0.43cm" svg:y="0.155cm"><draw:text-box><text:p text:style-name="P22"><text:span text:style-name="T43">1 <text:s/></text:span><text:span text:style-name="T44">if</text:span><text:span text:style-name="T49">(</text:span><text:span text:style-name="T46">hora</text:span><text:span text:style-name="T45"> </text:span><text:span text:style-name="T47">&lt;</text:span><text:span text:style-name="T45"> </text:span><text:span text:style-name="T48">11</text:span><text:span text:style-name="T49">){</text:span></text:p><text:p text:style-name="P22"><text:span text:style-name="T43">2 <text:s/></text:span><text:span text:style-name="T45"><text:s/></text:span><text:span text:style-name="T46">System</text:span><text:span text:style-name="T49">.</text:span><text:span text:style-name="T51">out</text:span><text:span text:style-name="T49">.</text:span><text:span text:style-name="T51">println</text:span><text:span text:style-name="T49">(</text:span><text:span text:style-name="T53">"adios"</text:span><text:span text:style-name="T49">);</text:span></text:p><text:p text:style-name="P22"><text:span text:style-name="T43">3 <text:s/></text:span><text:span text:style-name="T49">}</text:span><text:span text:style-name="T45"> </text:span><text:span text:style-name="T44">else</text:span><text:span text:style-name="T45"> </text:span><text:span text:style-name="T46">System</text:span><text:span text:style-name="T49">.</text:span><text:span text:style-name="T51">out</text:span><text:span text:style-name="T49">.</text:span><text:span text:style-name="T51">println</text:span><text:span text:style-name="T49">(</text:span><text:span text:style-name="T53">"hola"</text:span><text:span text:style-name="T49">);</text:span></text:p></draw:text-box></draw:frame><text:span text:style-name="T5"/></text:p>
      <text:p text:style-name="P5"><text:span text:style-name="T31">Reducción de código de coincidencia de patrones</text:span><text:span text:style-name="T7">: </text:span><text:span text:style-name="T5">Java 16 introdujo oficialmente la coincidencia de patrones con las instrucciones </text:span><text:span text:style-name="T20">if</text:span><text:span text:style-name="T5"> y el operador </text:span><text:span text:style-name="T20">instanceof</text:span><text:span text:style-name="T5">.</text:span></text:p>
      <text:p text:style-name="P3"><text:span text:style-name="T5"/></text:p>
      <text:p text:style-name="P3"><text:span text:style-name="T5">La coincidencia de patrones es una técnica para controlar el flujo del programa que solo ejecuta una sección de código que cumple con ciertos criterios. Para comprender por qué se agregó esta herramienta, considera el siguiente código que toma una instancia de </text:span><text:span text:style-name="T20">Number</text:span><text:span text:style-name="T5"> y la compara con el valor 5. Si no has visto </text:span><text:span text:style-name="T20">Number</text:span><text:span text:style-name="T5"> o </text:span><text:span text:style-name="T20">Integer</text:span><text:span text:style-name="T5">, solo necesitas saber que </text:span><text:span text:style-name="T20">Integer</text:span><text:span text:style-name="T5"> hereda de </text:span><text:span text:style-name="T20">Number</text:span><text:span text:style-name="T5"> por ahora.</text:span></text:p>
      <text:p text:style-name="P3"><text:span text:style-name="T5"/></text:p>
      <text:p text:style-name="P3"><draw:frame text:anchor-type="paragraph" draw:z-index="4" draw:name="Marco de texto 2" draw:style-name="gr1" draw:text-style-name="P24" svg:width="12.415cm" svg:height="2.437cm" svg:x="0.43cm" svg:y="0.155cm"><draw:text-box><text:p text:style-name="P22"><text:span text:style-name="T43">1 <text:s/></text:span><text:span text:style-name="T44">void</text:span><text:span text:style-name="T45"> </text:span><text:span text:style-name="T46">compararEnteros</text:span><text:span text:style-name="T49">(</text:span><text:span text:style-name="T46">Number</text:span><text:span text:style-name="T45"> </text:span><text:span text:style-name="T46">number</text:span><text:span text:style-name="T49">)</text:span><text:span text:style-name="T45"> </text:span><text:span text:style-name="T49">{</text:span></text:p><text:p text:style-name="P22"><text:span text:style-name="T43">2 <text:s/></text:span><text:span text:style-name="T45"><text:s text:c="4"/></text:span><text:span text:style-name="T44">if</text:span><text:span text:style-name="T45"> </text:span><text:span text:style-name="T49">(</text:span><text:span text:style-name="T46">number</text:span><text:span text:style-name="T45"> </text:span><text:span text:style-name="T44">instanceof</text:span><text:span text:style-name="T45"> </text:span><text:span text:style-name="T46">Integer</text:span><text:span text:style-name="T49">)</text:span><text:span text:style-name="T45"> </text:span><text:span text:style-name="T49">{</text:span></text:p><text:p text:style-name="P22"><text:span text:style-name="T43">3 <text:s/></text:span><text:span text:style-name="T45"><text:s text:c="8"/></text:span><text:span text:style-name="T46">Integer</text:span><text:span text:style-name="T45"> </text:span><text:span text:style-name="T46">data</text:span><text:span text:style-name="T45"> </text:span><text:span text:style-name="T47">=</text:span><text:span text:style-name="T45"> </text:span><text:span text:style-name="T49">(</text:span><text:span text:style-name="T46">Integer</text:span><text:span text:style-name="T49">)</text:span><text:span text:style-name="T45"> </text:span><text:span text:style-name="T46">number</text:span><text:span text:style-name="T49">;</text:span></text:p><text:p text:style-name="P22"><text:span text:style-name="T43">4 <text:s/></text:span><text:span text:style-name="T45"><text:s text:c="8"/></text:span><text:span text:style-name="T46">System</text:span><text:span text:style-name="T49">.</text:span><text:span text:style-name="T51">out</text:span><text:span text:style-name="T49">.</text:span><text:span text:style-name="T51">println</text:span><text:span text:style-name="T49">(</text:span><text:span text:style-name="T46">data</text:span><text:span text:style-name="T49">.</text:span><text:span text:style-name="T51">compareTo</text:span><text:span text:style-name="T49">(</text:span><text:span text:style-name="T48">5</text:span><text:span text:style-name="T49">));</text:span></text:p><text:p text:style-name="P22"><text:span text:style-name="T43">5 <text:s/></text:span><text:span text:style-name="T45"><text:s text:c="4"/></text:span><text:span text:style-name="T49">}</text:span></text:p><text:p text:style-name="P22"><text:span text:style-name="T43">6 <text:s/></text:span><text:span text:style-name="T49">}</text:span></text:p></draw:text-box></draw:frame><text:span text:style-name="T5"/></text:p>
      <text:p text:style-name="P3"><text:span text:style-name="T5">El casting no es necesario ya que el método </text:span><text:span text:style-name="T20">compareTo()</text:span><text:span text:style-name="T5"> está definido en </text:span><text:span text:style-name="T20">Integer</text:span><text:span text:style-name="T5">, pero no en Number.</text:span></text:p>
      <text:p text:style-name="P3"><text:span text:style-name="T5"/></text:p>
      <text:p text:style-name="P3"><text:span text:style-name="T5">El código que primero verifica si una variable es de un tipo particular y luego la convierte inmediatamente a ese tipo es extremadamente común en el mundo Java. Es tan común que los autores de Java decidieron implementar una sintaxis más corta para ello: </text:span></text:p>
      <text:p text:style-name="P3"><text:span text:style-name="T5"/></text:p>
      <text:p text:style-name="P13"><draw:frame text:anchor-type="paragraph" draw:z-index="5" draw:name="Marco de texto 4" draw:style-name="gr1" draw:text-style-name="P24" svg:width="12.415cm" svg:height="2.031cm" svg:x="0.43cm" svg:y="0.155cm"><draw:text-box><text:p text:style-name="P22"><text:span text:style-name="T43">1 <text:s/></text:span><text:span text:style-name="T44">void</text:span><text:span text:style-name="T45"> </text:span><text:span text:style-name="T46">compararEnteros</text:span><text:span text:style-name="T49">(</text:span><text:span text:style-name="T46">Number</text:span><text:span text:style-name="T45"> </text:span><text:span text:style-name="T46">number</text:span><text:span text:style-name="T49">)</text:span><text:span text:style-name="T45"> </text:span><text:span text:style-name="T49">{</text:span></text:p><text:p text:style-name="P22"><text:span text:style-name="T43">2 <text:s/></text:span><text:span text:style-name="T45"><text:s text:c="4"/></text:span><text:span text:style-name="T44">if</text:span><text:span text:style-name="T45"> </text:span><text:span text:style-name="T49">(</text:span><text:span text:style-name="T46">number</text:span><text:span text:style-name="T45"> </text:span><text:span text:style-name="T44">instanceof</text:span><text:span text:style-name="T45"> </text:span><text:span text:style-name="T46">Integer</text:span><text:span text:style-name="T45"> </text:span><text:span text:style-name="T46">data</text:span><text:span text:style-name="T49">)</text:span><text:span text:style-name="T45"> </text:span><text:span text:style-name="T49">{</text:span></text:p><text:p text:style-name="P22"><text:span text:style-name="T43">3 <text:s/></text:span><text:span text:style-name="T45"><text:s text:c="8"/></text:span><text:span text:style-name="T46">System</text:span><text:span text:style-name="T49">.</text:span><text:span text:style-name="T51">out</text:span><text:span text:style-name="T49">.</text:span><text:span text:style-name="T51">println</text:span><text:span text:style-name="T49">(</text:span><text:span text:style-name="T46">data</text:span><text:span text:style-name="T49">.</text:span><text:span text:style-name="T51">compareTo</text:span><text:span text:style-name="T49">(</text:span><text:span text:style-name="T48">5</text:span><text:span text:style-name="T49">));</text:span></text:p><text:p text:style-name="P22"><text:span text:style-name="T43">4 <text:s/></text:span><text:span text:style-name="T45"><text:s text:c="4"/></text:span><text:span text:style-name="T49">}</text:span></text:p><text:p text:style-name="P22"><text:span text:style-name="T43">5 <text:s/></text:span><text:span text:style-name="T49">}</text:span></text:p></draw:text-box></draw:frame></text:p>
      <text:p text:style-name="P13">La variable <text:span text:style-name="T2">data</text:span> en este ejemplo se conoce como la variable de patrón. Ten en cuenta que este código también evita cualquier <text:span text:style-name="T2">ClassCastException</text:span> potencial porque la operación de casting se ejecuta solo si el operador <text:span text:style-name="T2">instanceof</text:span> implícito devuelve verdadero.</text:p>
      <text:p text:style-name="P13"/>
      <text:p text:style-name="P21">La coincidencia de patrones incluye expresiones que se pueden usar para filtrar datos, como en el siguiente ejemplo:</text:p>
      <text:p text:style-name="P3"><draw:frame text:anchor-type="paragraph" draw:z-index="6" draw:name="Marco de texto 5" draw:style-name="gr1" draw:text-style-name="P24" svg:width="12.415cm" svg:height="2.031cm" svg:x="0.43cm" svg:y="0.155cm"><draw:text-box><text:p text:style-name="P22"><text:span text:style-name="T43">1 <text:s/></text:span><text:span text:style-name="T44">void</text:span><text:span text:style-name="T45"> </text:span><text:span text:style-name="T46">printIntegersGreaterThan5</text:span><text:span text:style-name="T49">(</text:span><text:span text:style-name="T46">Number</text:span><text:span text:style-name="T45"> </text:span><text:span text:style-name="T46">number</text:span><text:span text:style-name="T49">)</text:span><text:span text:style-name="T45"> </text:span><text:span text:style-name="T49">{</text:span></text:p><text:p text:style-name="P22"><text:span text:style-name="T43">2 <text:s/></text:span><text:span text:style-name="T45"><text:s text:c="4"/></text:span><text:span text:style-name="T44">if</text:span><text:span text:style-name="T45"> </text:span><text:span text:style-name="T49">(</text:span><text:span text:style-name="T46">number</text:span><text:span text:style-name="T45"> </text:span><text:span text:style-name="T44">instanceof</text:span><text:span text:style-name="T45"> </text:span><text:span text:style-name="T46">Integer</text:span><text:span text:style-name="T45"> </text:span><text:span text:style-name="T46">data</text:span><text:span text:style-name="T45"> </text:span><text:span text:style-name="T47">&amp;&amp;</text:span><text:span text:style-name="T45"> </text:span><text:span text:style-name="T46">data</text:span><text:span text:style-name="T49">.</text:span><text:span text:style-name="T51">compareTo</text:span><text:span text:style-name="T49">(</text:span><text:span text:style-name="T48">5</text:span><text:span text:style-name="T49">)</text:span><text:span text:style-name="T45"> </text:span><text:span text:style-name="T47">&gt;</text:span><text:span text:style-name="T45"> </text:span><text:span text:style-name="T48">0</text:span><text:span text:style-name="T49">)</text:span><text:span text:style-name="T45"> </text:span><text:span text:style-name="T49">{</text:span></text:p><text:p text:style-name="P22"><text:span text:style-name="T43">3 <text:s/></text:span><text:span text:style-name="T45"><text:s text:c="8"/></text:span><text:span text:style-name="T46">System</text:span><text:span text:style-name="T49">.</text:span><text:span text:style-name="T51">out</text:span><text:span text:style-name="T49">.</text:span><text:span text:style-name="T51">print</text:span><text:span text:style-name="T49">(</text:span><text:span text:style-name="T46">data</text:span><text:span text:style-name="T49">);</text:span></text:p><text:p text:style-name="P22"><text:span text:style-name="T43">4 <text:s/></text:span><text:span text:style-name="T45"><text:s text:c="4"/></text:span><text:span text:style-name="T49">}</text:span></text:p><text:p text:style-name="P22"><text:span text:style-name="T43">5 <text:s/></text:span><text:span text:style-name="T49">}</text:span></text:p></draw:text-box></draw:frame><text:span text:style-name="T5"/></text:p>
      <text:p text:style-name="P3"><text:span text:style-name="T5">Podemos aplicar varios filtros, o patrones, para que la sentencia </text:span><text:span text:style-name="T20">if</text:span><text:span text:style-name="T5"> se ejecute solo en circunstancias específicas. Observa que estamos usando la variable de patrón en una expresión en la misma línea en la que se declara.</text:span></text:p>
      <text:p text:style-name="P3"><text:span text:style-name="T5"/></text:p>
      <text:p text:style-name="P3"><text:span text:style-name="T5"/></text:p>
      <text:p text:style-name="P3"><text:soft-page-break/><text:span text:style-name="T5">El tipo de la variable de patrón debe ser un subtipo de la variable en el lado izquierdo de la expresión. Tampoco puede ser del mismo tipo. Sin embargo, esta regla no existe para las expresiones tradicionales del operador </text:span><text:span text:style-name="T20">instanceof</text:span><text:span text:style-name="T5">. Considera los siguientes dos usos del operador </text:span><text:span text:style-name="T20">instanceof</text:span><text:span text:style-name="T5">:</text:span></text:p>
      <text:p text:style-name="P3"><text:span text:style-name="T5"/></text:p>
      <text:p text:style-name="P13"><draw:frame text:anchor-type="paragraph" draw:z-index="7" draw:name="Marco de texto 6" draw:style-name="gr1" draw:text-style-name="P24" svg:width="12.415cm" svg:height="1.389cm" svg:x="0.43cm" svg:y="0.155cm"><draw:text-box><text:p text:style-name="P22"><text:span text:style-name="T43">1 <text:s/></text:span><text:span text:style-name="T46">Integer</text:span><text:span text:style-name="T45"> </text:span><text:span text:style-name="T46">value</text:span><text:span text:style-name="T45"> </text:span><text:span text:style-name="T47">=</text:span><text:span text:style-name="T45"> </text:span><text:span text:style-name="T48">123</text:span><text:span text:style-name="T49">;</text:span></text:p><text:p text:style-name="P22"><text:span text:style-name="T43">2 <text:s/></text:span><text:span text:style-name="T44">if</text:span><text:span text:style-name="T45"> </text:span><text:span text:style-name="T49">(</text:span><text:span text:style-name="T46">value</text:span><text:span text:style-name="T45"> </text:span><text:span text:style-name="T44">instanceof</text:span><text:span text:style-name="T45"> </text:span><text:span text:style-name="T46">Integer</text:span><text:span text:style-name="T49">)</text:span><text:span text:style-name="T45"> </text:span><text:span text:style-name="T49">{}</text:span></text:p><text:p text:style-name="P22"><text:span text:style-name="T43">3 <text:s/></text:span><text:span text:style-name="T44">if</text:span><text:span text:style-name="T45"> </text:span><text:span text:style-name="T49">(</text:span><text:span text:style-name="T46">value</text:span><text:span text:style-name="T45"> </text:span><text:span text:style-name="T44">instanceof</text:span><text:span text:style-name="T45"> </text:span><text:span text:style-name="T46">Integer</text:span><text:span text:style-name="T45"> </text:span><text:span text:style-name="T46">data</text:span><text:span text:style-name="T49">)</text:span><text:span text:style-name="T45"> </text:span><text:span text:style-name="T49">{}</text:span><text:span text:style-name="T45"> </text:span><text:span text:style-name="T52">// NO COMPILA</text:span></text:p></draw:text-box></draw:frame></text:p>
      <text:p text:style-name="P13">Mientras que la segunda línea compila, la última no compila porque la coincidencia de patrones requiere que el tipo de la variable de patrón <text:span text:style-name="T40">(</text:span><text:span text:style-name="T2">value</text:span><text:span text:style-name="T3">)</text:span> sea <text:span text:style-name="T40">estrictamente </text:span>un subtipo de <text:span text:style-name="T2">Integer</text:span>.</text:p>
      <text:p text:style-name="P13"/>
      <text:p text:style-name="P13"><text:span text:style-name="T1">Alcance de flujo</text:span>: El compilador aplica el alcance del flujo cuando trabaja con la coincidencia de patrones. El alcance del flujo significa que la variable solo está dentro del alcance cuando el compilador puede determinar definitivamente su tipo.</text:p>
      <text:p text:style-name="P13"/>
      <text:p text:style-name="P3"><draw:frame text:anchor-type="paragraph" draw:z-index="8" draw:name="Marco de texto 7" draw:style-name="gr1" draw:text-style-name="P24" svg:width="12.415cm" svg:height="1.625cm" svg:x="0.43cm" svg:y="0.155cm"><draw:text-box><text:p text:style-name="P22"><text:span text:style-name="T43">1 <text:s/></text:span><text:span text:style-name="T44">void</text:span><text:span text:style-name="T45"> </text:span><text:span text:style-name="T46">printIntegersOrNumbersGreaterThan5</text:span><text:span text:style-name="T49">(</text:span><text:span text:style-name="T46">Number</text:span><text:span text:style-name="T45"> </text:span><text:span text:style-name="T46">number</text:span><text:span text:style-name="T49">)</text:span><text:span text:style-name="T45"> </text:span><text:span text:style-name="T49">{</text:span></text:p><text:p text:style-name="P22"><text:span text:style-name="T43">2 <text:s/></text:span><text:span text:style-name="T45"><text:s text:c="4"/></text:span><text:span text:style-name="T44">if</text:span><text:span text:style-name="T45"> </text:span><text:span text:style-name="T49">(</text:span><text:span text:style-name="T46">number</text:span><text:span text:style-name="T45"> </text:span><text:span text:style-name="T44">instanceof</text:span><text:span text:style-name="T45"> </text:span><text:span text:style-name="T46">Integer</text:span><text:span text:style-name="T45"> </text:span><text:span text:style-name="T46">data</text:span><text:span text:style-name="T45"> </text:span><text:span text:style-name="T47">||</text:span><text:span text:style-name="T45"> </text:span><text:span text:style-name="T46">data</text:span><text:span text:style-name="T49">.</text:span><text:span text:style-name="T51">compareTo</text:span><text:span text:style-name="T49">(</text:span><text:span text:style-name="T48">5</text:span><text:span text:style-name="T49">)</text:span><text:span text:style-name="T45"> </text:span><text:span text:style-name="T47">&gt;</text:span><text:span text:style-name="T45"> </text:span><text:span text:style-name="T48">0</text:span><text:span text:style-name="T49">)</text:span></text:p><text:p text:style-name="P22"><text:span text:style-name="T43">3 <text:s/></text:span><text:span text:style-name="T45"><text:s text:c="8"/></text:span><text:span text:style-name="T46">System</text:span><text:span text:style-name="T49">.</text:span><text:span text:style-name="T51">out</text:span><text:span text:style-name="T49">.</text:span><text:span text:style-name="T51">print</text:span><text:span text:style-name="T49">(</text:span><text:span text:style-name="T46">data</text:span><text:span text:style-name="T49">);</text:span></text:p><text:p text:style-name="P22"><text:span text:style-name="T43">4 <text:s/></text:span><text:span text:style-name="T49">}</text:span></text:p></draw:text-box></draw:frame><text:span text:style-name="T5"/></text:p>
      <text:p text:style-name="P3"><text:span text:style-name="T5">El problema radica en que la variable "data" solo está definida si la condición </text:span><text:span text:style-name="T20">number</text:span><text:span text:style-name="T5"> </text:span><text:span text:style-name="T20">instanceof</text:span><text:span text:style-name="T5"> </text:span><text:span text:style-name="T20">Integer</text:span><text:span text:style-name="T5"> es verdadera. Si </text:span><text:span text:style-name="T20">number</text:span><text:span text:style-name="T5"> no es un </text:span><text:span text:style-name="T20">Integer</text:span><text:span text:style-name="T5">, "</text:span><text:span text:style-name="T15">data</text:span><text:span text:style-name="T5">" no existe y </text:span><text:span text:style-name="T8">al </text:span><text:span text:style-name="T5">tratar de usarla en la segunda parte de la condición (</text:span><text:span text:style-name="T20">|| data.compareTo(5) &gt; 0</text:span><text:span text:style-name="T5">) causará un error de compilación. El compilador no puede garantizar que "data" tenga un valor válido en todos los casos, por lo que la considera fuera de alcance y no compila el código. </text:span><text:span text:style-name="T6">P</text:span><text:span text:style-name="T5">or otra parte el siguiente ejemplo compila:</text:span></text:p>
      <text:p text:style-name="P3"><text:span text:style-name="T5"/></text:p>
      <text:p text:style-name="P13"><draw:frame text:anchor-type="paragraph" draw:z-index="9" draw:name="Marco de texto 8" draw:style-name="gr1" draw:text-style-name="P24" svg:width="12.415cm" svg:height="2.031cm" svg:x="0.43cm" svg:y="0.155cm"><draw:text-box><text:p text:style-name="P22"><text:span text:style-name="T43">1 <text:s/></text:span><text:span text:style-name="T44">void</text:span><text:span text:style-name="T45"> </text:span><text:span text:style-name="T46">printOnlyIntegers</text:span><text:span text:style-name="T49">(</text:span><text:span text:style-name="T46">Number</text:span><text:span text:style-name="T45"> </text:span><text:span text:style-name="T46">number</text:span><text:span text:style-name="T49">)</text:span><text:span text:style-name="T45"> </text:span><text:span text:style-name="T49">{</text:span></text:p><text:p text:style-name="P22"><text:span text:style-name="T43">2 <text:s/></text:span><text:span text:style-name="T45"><text:s text:c="4"/></text:span><text:span text:style-name="T44">if</text:span><text:span text:style-name="T45"> </text:span><text:span text:style-name="T49">(</text:span><text:span text:style-name="T47">!</text:span><text:span text:style-name="T49">(</text:span><text:span text:style-name="T46">number</text:span><text:span text:style-name="T45"> </text:span><text:span text:style-name="T44">instanceof</text:span><text:span text:style-name="T45"> </text:span><text:span text:style-name="T46">Integer</text:span><text:span text:style-name="T45"> </text:span><text:span text:style-name="T46">data</text:span><text:span text:style-name="T49">))</text:span></text:p><text:p text:style-name="P22"><text:span text:style-name="T43">3 <text:s/></text:span><text:span text:style-name="T45"><text:s text:c="8"/></text:span><text:span text:style-name="T44">return</text:span><text:span text:style-name="T49">;</text:span></text:p><text:p text:style-name="P22"><text:span text:style-name="T43">4 <text:s/></text:span><text:span text:style-name="T45"><text:s text:c="4"/></text:span><text:span text:style-name="T46">System</text:span><text:span text:style-name="T49">.</text:span><text:span text:style-name="T51">out</text:span><text:span text:style-name="T49">.</text:span><text:span text:style-name="T51">print</text:span><text:span text:style-name="T49">(</text:span><text:span text:style-name="T46">data</text:span><text:span text:style-name="T49">.</text:span><text:span text:style-name="T51">intValue</text:span><text:span text:style-name="T49">());</text:span></text:p><text:p text:style-name="P22"><text:span text:style-name="T43">5 <text:s/></text:span><text:span text:style-name="T49">}</text:span></text:p></draw:text-box></draw:frame></text:p>
      <text:p text:style-name="P13">esto porque si la condición se cumple el código debe irse a la ultima linea de código para finalizar la función y para ello se debe asegurar la penúltima linea. esto provoca que si el <text:span text:style-name="T3">if</text:span> no se cumple la penúltima linea si se ejecute.</text:p>
      <text:p text:style-name="P13"/>
      <text:p text:style-name="P17"><text:span text:style-name="T41">S</text:span>entencia SWITCH:</text:p>
      <text:p text:style-name="P13"/>
      <text:p text:style-name="P13"><text:span text:style-name="T42">En e</text:span>ste tipo de sentencia entra en la primera coincidencia que se encuentre y de no haber ejecuta la sentencia <text:span text:style-name="T2">default</text:span></text:p>
      <text:p text:style-name="P13"/>
      <text:p text:style-name="P13"><draw:frame draw:style-name="fr2" draw:name="Imagen3" text:anchor-type="char" svg:width="9.617cm" svg:height="6.35cm" draw:z-index="10"><draw:image xlink:href="Pictures/10000000000002DA000001E2C284D432.jpg" xlink:type="simple" xlink:show="embed" xlink:actuate="onLoad" draw:mime-type="image/jpeg"/></draw:frame></text:p>
      <text:p text:style-name="P13">a partir de Java 14 se puede combinar casos con una coma</text:p>
      <text:p text:style-name="P13"/>
      <text:p text:style-name="P3"><draw:frame text:anchor-type="paragraph" draw:z-index="11" draw:name="Marco de texto 9" draw:style-name="gr1" draw:text-style-name="P24" svg:width="12.415cm" svg:height="1.625cm" svg:x="0.43cm" svg:y="0.155cm"><draw:text-box><text:p text:style-name="P22"><text:span text:style-name="T43">1 <text:s/></text:span><text:span text:style-name="T44">switch</text:span><text:span text:style-name="T45"> </text:span><text:span text:style-name="T49">(</text:span><text:span text:style-name="T46">animal</text:span><text:span text:style-name="T49">){</text:span></text:p><text:p text:style-name="P22"><text:span text:style-name="T43">2 <text:s/></text:span><text:span text:style-name="T45"><text:s/></text:span><text:span text:style-name="T44">case</text:span><text:span text:style-name="T45"> </text:span><text:span text:style-name="T48">1</text:span><text:span text:style-name="T49">,</text:span><text:span text:style-name="T45"> </text:span><text:span text:style-name="T48">2</text:span><text:span text:style-name="T49">:</text:span><text:span text:style-name="T45"> </text:span><text:span text:style-name="T46">System</text:span><text:span text:style-name="T49">.</text:span><text:span text:style-name="T51">out</text:span><text:span text:style-name="T49">.</text:span><text:span text:style-name="T51">println</text:span><text:span text:style-name="T49">(</text:span><text:span text:style-name="T53">"hola"</text:span><text:span text:style-name="T49">);</text:span></text:p><text:p text:style-name="P22"><text:span text:style-name="T43">3 <text:s/></text:span><text:span text:style-name="T45"><text:s/></text:span><text:span text:style-name="T44">case</text:span><text:span text:style-name="T45"> </text:span><text:span text:style-name="T48">3</text:span><text:span text:style-name="T49">:</text:span><text:span text:style-name="T45"> </text:span><text:span text:style-name="T46">System</text:span><text:span text:style-name="T49">.</text:span><text:span text:style-name="T51">out</text:span><text:span text:style-name="T49">.</text:span><text:span text:style-name="T51">println</text:span><text:span text:style-name="T49">(</text:span><text:span text:style-name="T53">"adios"</text:span><text:span text:style-name="T49">);</text:span></text:p><text:p text:style-name="P22"><text:span text:style-name="T43">4 <text:s/></text:span><text:span text:style-name="T49">}</text:span></text:p></draw:text-box></draw:frame><text:span text:style-name="T5"/></text:p>
      <text:p text:style-name="P3"><text:span text:style-name="T5">Tener en cuenta que no es obligatorio tener casos dentro de una sentencia </text:span><text:span text:style-name="T20">switch</text:span><text:span text:style-name="T5">, por ejemplo:</text:span></text:p>
      <text:p text:style-name="P3"><text:span text:style-name="T5"/></text:p>
      <text:p text:style-name="P15"><text:span text:style-name="T5">switch(month){} // compilara</text:span></text:p>
      <text:p text:style-name="P3"><text:span text:style-name="T5"/></text:p>
      <text:p text:style-name="P3"><text:span text:style-name="T5">utilizando la sentencia </text:span><text:span text:style-name="T21">break</text:span><text:span text:style-name="T5">; podemos saltar </text:span><text:span text:style-name="T9">las</text:span><text:span text:style-name="T5"> ejecuciones restantes después de haber ejecutado la sentencia asociado a la primera ubicación del </text:span><text:span text:style-name="T21">case</text:span><text:span text:style-name="T27">. P</text:span><text:span text:style-name="T5">or ejemplo en el siguiente código:</text:span></text:p>
      <text:p text:style-name="P3"><text:span text:style-name="T5"/></text:p>
      <text:p text:style-name="P3"><draw:frame text:anchor-type="paragraph" draw:z-index="12" draw:name="Marco de texto 10" draw:style-name="gr1" draw:text-style-name="P24" svg:width="12.415cm" svg:height="4.465cm" svg:x="0.43cm" svg:y="0.155cm"><draw:text-box><text:p text:style-name="P22"><text:span text:style-name="T43"><text:s/></text:span><text:span text:style-name="T43">1 <text:s/></text:span><text:span text:style-name="T44">public</text:span><text:span text:style-name="T45"> </text:span><text:span text:style-name="T44">void</text:span><text:span text:style-name="T45"> </text:span><text:span text:style-name="T46">printSeason</text:span><text:span text:style-name="T49">(</text:span><text:span text:style-name="T44">int</text:span><text:span text:style-name="T45"> </text:span><text:span text:style-name="T46">month</text:span><text:span text:style-name="T49">)</text:span><text:span text:style-name="T45"> </text:span><text:span text:style-name="T49">{</text:span></text:p><text:p text:style-name="P22"><text:span text:style-name="T43"><text:s/></text:span><text:span text:style-name="T43">2 <text:s/></text:span><text:span text:style-name="T45"><text:tab/></text:span><text:span text:style-name="T45"><text:tab/></text:span><text:span text:style-name="T44">switch</text:span><text:span text:style-name="T45"> </text:span><text:span text:style-name="T49">(</text:span><text:span text:style-name="T46">month</text:span><text:span text:style-name="T49">)</text:span><text:span text:style-name="T45"> </text:span><text:span text:style-name="T49">{</text:span></text:p><text:p text:style-name="P22"><text:span text:style-name="T43"><text:s/></text:span><text:span text:style-name="T43">3 <text:s/></text:span><text:span text:style-name="T45"><text:tab/></text:span><text:span text:style-name="T45"><text:tab/></text:span><text:span text:style-name="T44">case</text:span><text:span text:style-name="T45"> </text:span><text:span text:style-name="T48">1</text:span><text:span text:style-name="T49">,</text:span><text:span text:style-name="T45"> </text:span><text:span text:style-name="T48">2</text:span><text:span text:style-name="T49">,</text:span><text:span text:style-name="T45"> </text:span><text:span text:style-name="T48">3</text:span><text:span text:style-name="T49">:</text:span><text:span text:style-name="T45"> </text:span><text:span text:style-name="T46">System</text:span><text:span text:style-name="T49">.</text:span><text:span text:style-name="T51">out</text:span><text:span text:style-name="T49">.</text:span><text:span text:style-name="T51">print</text:span><text:span text:style-name="T49">(</text:span><text:span text:style-name="T53">"Winter"</text:span><text:span text:style-name="T49">);</text:span></text:p><text:p text:style-name="P22"><text:span text:style-name="T43"><text:s/></text:span><text:span text:style-name="T43">4 <text:s/></text:span><text:span text:style-name="T45"><text:tab/></text:span><text:span text:style-name="T45"><text:tab/></text:span><text:span text:style-name="T44">case</text:span><text:span text:style-name="T45"> </text:span><text:span text:style-name="T48">4</text:span><text:span text:style-name="T49">,</text:span><text:span text:style-name="T45"> </text:span><text:span text:style-name="T48">5</text:span><text:span text:style-name="T49">,</text:span><text:span text:style-name="T45"> </text:span><text:span text:style-name="T48">6</text:span><text:span text:style-name="T49">:</text:span><text:span text:style-name="T45"> </text:span><text:span text:style-name="T46">System</text:span><text:span text:style-name="T49">.</text:span><text:span text:style-name="T51">out</text:span><text:span text:style-name="T49">.</text:span><text:span text:style-name="T51">print</text:span><text:span text:style-name="T49">(</text:span><text:span text:style-name="T53">"Spring"</text:span><text:span text:style-name="T49">);</text:span></text:p><text:p text:style-name="P22"><text:span text:style-name="T43"><text:s/></text:span><text:span text:style-name="T43">5 <text:s/></text:span><text:span text:style-name="T45"><text:tab/></text:span><text:span text:style-name="T45"><text:tab/></text:span><text:span text:style-name="T44">default</text:span><text:span text:style-name="T49">:</text:span><text:span text:style-name="T45"> </text:span><text:span text:style-name="T46">System</text:span><text:span text:style-name="T49">.</text:span><text:span text:style-name="T51">out</text:span><text:span text:style-name="T49">.</text:span><text:span text:style-name="T51">print</text:span><text:span text:style-name="T49">(</text:span><text:span text:style-name="T53">"Unknown"</text:span><text:span text:style-name="T49">);</text:span></text:p><text:p text:style-name="P22"><text:span text:style-name="T43"><text:s/></text:span><text:span text:style-name="T43">6 <text:s/></text:span><text:span text:style-name="T45"><text:tab/></text:span><text:span text:style-name="T45"><text:tab/></text:span><text:span text:style-name="T44">case</text:span><text:span text:style-name="T45"> </text:span><text:span text:style-name="T48">7</text:span><text:span text:style-name="T49">,</text:span><text:span text:style-name="T45"> </text:span><text:span text:style-name="T48">8</text:span><text:span text:style-name="T49">,</text:span><text:span text:style-name="T45"> </text:span><text:span text:style-name="T48">9</text:span><text:span text:style-name="T49">:</text:span><text:span text:style-name="T45"> </text:span><text:span text:style-name="T46">System</text:span><text:span text:style-name="T49">.</text:span><text:span text:style-name="T51">out</text:span><text:span text:style-name="T49">.</text:span><text:span text:style-name="T51">print</text:span><text:span text:style-name="T49">(</text:span><text:span text:style-name="T53">"Summer"</text:span><text:span text:style-name="T49">);</text:span></text:p><text:p text:style-name="P22"><text:span text:style-name="T43"><text:s/></text:span><text:span text:style-name="T43">7 <text:s/></text:span><text:span text:style-name="T45"><text:tab/></text:span><text:span text:style-name="T45"><text:tab/></text:span><text:span text:style-name="T44">case</text:span><text:span text:style-name="T45"> </text:span><text:span text:style-name="T48">10</text:span><text:span text:style-name="T49">,</text:span><text:span text:style-name="T45"> </text:span><text:span text:style-name="T48">11</text:span><text:span text:style-name="T49">,</text:span><text:span text:style-name="T45"> </text:span><text:span text:style-name="T48">12</text:span><text:span text:style-name="T49">:</text:span><text:span text:style-name="T45"> </text:span><text:span text:style-name="T46">System</text:span><text:span text:style-name="T49">.</text:span><text:span text:style-name="T51">out</text:span><text:span text:style-name="T49">.</text:span><text:span text:style-name="T51">print</text:span><text:span text:style-name="T49">(</text:span><text:span text:style-name="T53">"Fall"</text:span><text:span text:style-name="T49">);</text:span></text:p><text:p text:style-name="P22"><text:span text:style-name="T43"><text:s/></text:span><text:span text:style-name="T43">8 <text:s/></text:span><text:span text:style-name="T45"><text:tab/></text:span><text:span text:style-name="T45"><text:tab/></text:span><text:span text:style-name="T49">}</text:span></text:p><text:p text:style-name="P22"><text:span text:style-name="T43"><text:s/></text:span><text:span text:style-name="T43">9 <text:s/></text:span><text:span text:style-name="T45"><text:s/></text:span><text:span text:style-name="T49">}</text:span></text:p><text:p text:style-name="P22"><text:span text:style-name="T43">10 <text:s/></text:span><text:span text:style-name="T46">Capitulo1</text:span><text:span text:style-name="T45"> </text:span><text:span text:style-name="T46">a1</text:span><text:span text:style-name="T45"> </text:span><text:span text:style-name="T47">=</text:span><text:span text:style-name="T45"> </text:span><text:span text:style-name="T44">new</text:span><text:span text:style-name="T45"> </text:span><text:span text:style-name="T46">Capitulo1</text:span><text:span text:style-name="T49">();</text:span></text:p><text:p text:style-name="P22"><text:span text:style-name="T43">11 <text:s/></text:span><text:span text:style-name="T46">a1</text:span><text:span text:style-name="T49">.</text:span><text:span text:style-name="T51">printSeason</text:span><text:span text:style-name="T49">(</text:span><text:span text:style-name="T48">5</text:span><text:span text:style-name="T49">);</text:span><text:span text:style-name="T45"> </text:span><text:span text:style-name="T52">//se imprime: SpringUnknownSummerFall</text:span></text:p></draw:text-box></draw:frame><text:span text:style-name="T5"/></text:p>
      <text:p text:style-name="P3"><text:soft-page-break/><text:span text:style-name="T5">las sentencias </text:span><text:span text:style-name="T21">switch</text:span><text:span text:style-name="T5"> soportan los datos de tipo:</text:span></text:p>
      <text:list text:style-name="L1">
        <text:list-item>
          <text:p text:style-name="P6"><text:span text:style-name="T20">int</text:span><text:span text:style-name="T5"> y </text:span><text:span text:style-name="T20">Integer</text:span></text:p>
        </text:list-item>
        <text:list-item>
          <text:p text:style-name="P6"><text:span text:style-name="T20">byte</text:span><text:span text:style-name="T5"> y </text:span><text:span text:style-name="T20">Byte</text:span></text:p>
        </text:list-item>
        <text:list-item>
          <text:p text:style-name="P6"><text:span text:style-name="T20">short</text:span><text:span text:style-name="T5"> y </text:span><text:span text:style-name="T20">Short</text:span></text:p>
        </text:list-item>
        <text:list-item>
          <text:p text:style-name="P6"><text:span text:style-name="T20">char</text:span><text:span text:style-name="T5"> y </text:span><text:span text:style-name="T20">Character</text:span></text:p>
        </text:list-item>
        <text:list-item>
          <text:p text:style-name="P16"><text:span text:style-name="T5">String</text:span></text:p>
        </text:list-item>
        <text:list-item>
          <text:p text:style-name="P6"><text:span text:style-name="T20">enum</text:span><text:span text:style-name="T5"> </text:span><text:span text:style-name="T9">(</text:span><text:span text:style-name="T5">son un grupo de constantes como los días de la semana o meses del año</text:span><text:span text:style-name="T9">)</text:span></text:p>
        </text:list-item>
        <text:list-item>
          <text:p text:style-name="P6"><text:span text:style-name="T20">var</text:span><text:span text:style-name="T5"> (si el tipo fue resuelto previamente)</text:span></text:p>
        </text:list-item>
      </text:list>
      <text:p text:style-name="P3"><text:span text:style-name="T5"/></text:p>
      <text:p text:style-name="P3"><text:span text:style-name="T9">L</text:span><text:span text:style-name="T5">os valores aceptados para los </text:span><text:span text:style-name="T21">cases</text:span><text:span text:style-name="T5"> deben tener en cuenta; Primero, los valores en cada sentencia </text:span><text:span text:style-name="T20">case</text:span><text:span text:style-name="T5"> deben ser constantes conocidas en tiempo de compilación y del mismo tipo de dato que el "</text:span><text:span text:style-name="T15">valor</text:span><text:span text:style-name="T5">" del </text:span><text:span text:style-name="T20">switch</text:span><text:span text:style-name="T5">. Esto significa que solo puedes usar literales, constantes de enumeraciones (</text:span><text:span text:style-name="T20">enum</text:span><text:span text:style-name="T5">) o variables constantes "</text:span><text:span text:style-name="T20">final</text:span><text:span text:style-name="T5">" del mismo tipo de dato. Por ejemplo:</text:span></text:p>
      <text:p text:style-name="P3"><text:span text:style-name="T5"/></text:p>
      <text:p text:style-name="P3"><draw:frame text:anchor-type="paragraph" draw:z-index="13" draw:name="Marco de texto 11" draw:style-name="gr3" draw:text-style-name="P24" svg:width="12.752cm" svg:height="5.859cm" svg:x="0.43cm" svg:y="0.155cm"><draw:text-box><text:p text:style-name="P22"><text:span text:style-name="T43"><text:s/></text:span><text:span text:style-name="T43">1 <text:s/></text:span><text:span text:style-name="T44">final</text:span><text:span text:style-name="T45"> </text:span><text:span text:style-name="T44">int</text:span><text:span text:style-name="T45"> </text:span><text:span text:style-name="T46">getCookies</text:span><text:span text:style-name="T49">()</text:span><text:span text:style-name="T45"> </text:span><text:span text:style-name="T49">{</text:span><text:span text:style-name="T45"> </text:span><text:span text:style-name="T44">return</text:span><text:span text:style-name="T45"> </text:span><text:span text:style-name="T48">4</text:span><text:span text:style-name="T49">;</text:span><text:span text:style-name="T45"> </text:span><text:span text:style-name="T49">}</text:span></text:p><text:p text:style-name="P22"><text:span text:style-name="T43"><text:s/></text:span><text:span text:style-name="T43">2 <text:s/></text:span><text:span text:style-name="T44">void</text:span><text:span text:style-name="T45"> </text:span><text:span text:style-name="T46">feedAnimals</text:span><text:span text:style-name="T49">()</text:span><text:span text:style-name="T45"> </text:span><text:span text:style-name="T49">{</text:span></text:p><text:p text:style-name="P22"><text:span text:style-name="T43"><text:s/></text:span><text:span text:style-name="T43">3 <text:s/></text:span><text:span text:style-name="T45"><text:s text:c="4"/></text:span><text:span text:style-name="T44">final</text:span><text:span text:style-name="T45"> </text:span><text:span text:style-name="T44">int</text:span><text:span text:style-name="T45"> </text:span><text:span text:style-name="T46">bananas</text:span><text:span text:style-name="T45"> </text:span><text:span text:style-name="T47">=</text:span><text:span text:style-name="T45"> </text:span><text:span text:style-name="T48">1</text:span><text:span text:style-name="T49">;</text:span></text:p><text:p text:style-name="P22"><text:span text:style-name="T43"><text:s/></text:span><text:span text:style-name="T43">4 <text:s/></text:span><text:span text:style-name="T45"><text:s text:c="4"/></text:span><text:span text:style-name="T44">int</text:span><text:span text:style-name="T45"> </text:span><text:span text:style-name="T46">apples</text:span><text:span text:style-name="T45"> </text:span><text:span text:style-name="T47">=</text:span><text:span text:style-name="T45"> </text:span><text:span text:style-name="T48">2</text:span><text:span text:style-name="T49">;</text:span></text:p><text:p text:style-name="P22"><text:span text:style-name="T43"><text:s/></text:span><text:span text:style-name="T43">5 <text:s/></text:span><text:span text:style-name="T45"><text:s text:c="4"/></text:span><text:span text:style-name="T44">int</text:span><text:span text:style-name="T45"> </text:span><text:span text:style-name="T46">numberOfAnimals</text:span><text:span text:style-name="T45"> </text:span><text:span text:style-name="T47">=</text:span><text:span text:style-name="T45"> </text:span><text:span text:style-name="T48">3</text:span><text:span text:style-name="T49">;</text:span></text:p><text:p text:style-name="P22"><text:span text:style-name="T43"><text:s/></text:span><text:span text:style-name="T43">6 <text:s/></text:span><text:span text:style-name="T45"><text:s text:c="4"/></text:span><text:span text:style-name="T44">final</text:span><text:span text:style-name="T45"> </text:span><text:span text:style-name="T44">int</text:span><text:span text:style-name="T45"> </text:span><text:span text:style-name="T46">cookies</text:span><text:span text:style-name="T45"> </text:span><text:span text:style-name="T47">=</text:span><text:span text:style-name="T45"> </text:span><text:span text:style-name="T46">getCookies</text:span><text:span text:style-name="T49">();</text:span></text:p><text:p text:style-name="P22"><text:span text:style-name="T43"><text:s/></text:span><text:span text:style-name="T43">7 <text:s/></text:span><text:span text:style-name="T45"><text:s text:c="4"/></text:span><text:span text:style-name="T44">switch</text:span><text:span text:style-name="T49">(</text:span><text:span text:style-name="T46">numberOfAnimals</text:span><text:span text:style-name="T49">)</text:span><text:span text:style-name="T45"> </text:span><text:span text:style-name="T49">{</text:span></text:p><text:p text:style-name="P22"><text:span text:style-name="T43"><text:s/></text:span><text:span text:style-name="T43">8 <text:s/></text:span><text:span text:style-name="T45"><text:s text:c="8"/></text:span><text:span text:style-name="T44">case</text:span><text:span text:style-name="T45"> </text:span><text:span text:style-name="T46">bananas</text:span><text:span text:style-name="T49">:</text:span><text:span text:style-name="T45"> <text:s text:c="6"/></text:span><text:span text:style-name="T52">// compila, por utilizar </text:span><text:span text:style-name="T56">final</text:span></text:p><text:p text:style-name="P22"><text:span text:style-name="T43"><text:s/></text:span><text:span text:style-name="T43">9 <text:s/></text:span><text:span text:style-name="T45"><text:s text:c="8"/></text:span><text:span text:style-name="T44">case</text:span><text:span text:style-name="T45"> </text:span><text:span text:style-name="T46">apples</text:span><text:span text:style-name="T49">:</text:span><text:span text:style-name="T45"> <text:s text:c="7"/></text:span><text:span text:style-name="T52">// no compila, <text:s/>por no usar </text:span><text:span text:style-name="T56">final</text:span></text:p><text:p text:style-name="P22"><text:span text:style-name="T43">10 <text:s/></text:span><text:span text:style-name="T45"><text:s text:c="8"/></text:span><text:span text:style-name="T44">case</text:span><text:span text:style-name="T45"> </text:span><text:span text:style-name="T46">getCookies</text:span><text:span text:style-name="T49">():</text:span><text:span text:style-name="T45"> <text:s/></text:span><text:span text:style-name="T52">// no compila, el método se ejecuta en tiempo de ejecución</text:span></text:p><text:p text:style-name="P22"><text:span text:style-name="T43">11 <text:s/></text:span><text:span text:style-name="T45"><text:s text:c="8"/></text:span><text:span text:style-name="T44">case</text:span><text:span text:style-name="T45"> </text:span><text:span text:style-name="T46">cookies</text:span><text:span text:style-name="T49">:</text:span><text:span text:style-name="T45"> </text:span><text:span text:style-name="T52">// no compila, el método se ejecuta en tiempo de ejecución</text:span></text:p><text:p text:style-name="P22"><text:span text:style-name="T43">12 <text:s/></text:span><text:span text:style-name="T45"><text:s text:c="8"/></text:span><text:span text:style-name="T44">case</text:span><text:span text:style-name="T45"> </text:span><text:span text:style-name="T48">3</text:span><text:span text:style-name="T45"> </text:span><text:span text:style-name="T47">*</text:span><text:span text:style-name="T45"> </text:span><text:span text:style-name="T48">5</text:span><text:span text:style-name="T49">:</text:span><text:span text:style-name="T45"> <text:s/></text:span><text:span text:style-name="T52">// compila, porque el valor se determina en tiempo de compilación.</text:span></text:p><text:p text:style-name="P22"><text:span text:style-name="T43">13 <text:s/></text:span><text:span text:style-name="T45"><text:s text:c="4"/></text:span><text:span text:style-name="T49">}</text:span></text:p><text:p text:style-name="P22"><text:span text:style-name="T43">14 <text:s/></text:span><text:span text:style-name="T49">}</text:span></text:p></draw:text-box></draw:frame><text:span text:style-name="T5"/></text:p>
      <text:p text:style-name="P7"><text:span text:style-name="T32">E</text:span><text:span text:style-name="T30">xpresiones </text:span><text:span text:style-name="T36">switch</text:span><text:span text:style-name="T5">: Estas expresiones ofrecen una forma más concisa y expresiva de escribir código condicional en comparación con las instrucciones </text:span><text:span text:style-name="T20">switch</text:span><text:span text:style-name="T5"> tradicionales. </text:span></text:p>
      <text:p text:style-name="P7"><text:span text:style-name="T5"/></text:p>
      <text:p text:style-name="P7"><draw:frame draw:style-name="fr4" draw:name="Imagen4" text:anchor-type="char" svg:width="8.13cm" svg:height="4.267cm" draw:z-index="14"><draw:image xlink:href="Pictures/10000000000002D20000017B6E3122AC.jpg" xlink:type="simple" xlink:show="embed" xlink:actuate="onLoad" draw:mime-type="image/jpeg"/></draw:frame><text:span text:style-name="T5"/></text:p>
      <text:p text:style-name="P7"><text:span text:style-name="T10">Hay que tener </text:span><text:span text:style-name="T5">en cuenta que puede haber casos en los que esta nueva estructura requiera si o si una rama </text:span><text:span text:style-name="T20">default</text:span></text:p>
      <text:p text:style-name="P3"><text:span text:style-name="T5"/></text:p>
      <text:p text:style-name="P3"><draw:frame text:anchor-type="paragraph" draw:z-index="15" draw:name="Marco de texto 12" draw:style-name="gr1" draw:text-style-name="P24" svg:width="12.415cm" svg:height="3.654cm" svg:x="0.43cm" svg:y="0.155cm"><draw:text-box><text:p text:style-name="P22"><text:span text:style-name="T43">1 <text:s/></text:span><text:span text:style-name="T46">String</text:span><text:span text:style-name="T45"> </text:span><text:span text:style-name="T46">dayOfWeek</text:span><text:span text:style-name="T45"> </text:span><text:span text:style-name="T47">=</text:span><text:span text:style-name="T45"> </text:span><text:span text:style-name="T44">switch</text:span><text:span text:style-name="T45"> </text:span><text:span text:style-name="T49">(</text:span><text:span text:style-name="T46">day</text:span><text:span text:style-name="T49">)</text:span><text:span text:style-name="T45"> </text:span><text:span text:style-name="T49">{</text:span></text:p><text:p text:style-name="P22"><text:span text:style-name="T43">2 <text:s/></text:span><text:span text:style-name="T45"><text:s text:c="4"/></text:span><text:span text:style-name="T44">case</text:span><text:span text:style-name="T45"> </text:span><text:span text:style-name="T48">1</text:span><text:span text:style-name="T45"> </text:span><text:span text:style-name="T47">-&gt;</text:span><text:span text:style-name="T45"> </text:span><text:span text:style-name="T53">"Lunes"</text:span><text:span text:style-name="T49">;</text:span></text:p><text:p text:style-name="P22"><text:span text:style-name="T43">3 <text:s/></text:span><text:span text:style-name="T45"><text:s text:c="4"/></text:span><text:span text:style-name="T44">case</text:span><text:span text:style-name="T45"> </text:span><text:span text:style-name="T48">2</text:span><text:span text:style-name="T45"> </text:span><text:span text:style-name="T47">-&gt;</text:span><text:span text:style-name="T45"> </text:span><text:span text:style-name="T53">"Martes"</text:span><text:span text:style-name="T49">;</text:span></text:p><text:p text:style-name="P22"><text:span text:style-name="T43">4 <text:s/></text:span><text:span text:style-name="T45"><text:s text:c="4"/></text:span><text:span text:style-name="T44">case</text:span><text:span text:style-name="T45"> </text:span><text:span text:style-name="T48">3</text:span><text:span text:style-name="T49">,</text:span><text:span text:style-name="T45"> </text:span><text:span text:style-name="T48">4</text:span><text:span text:style-name="T49">,</text:span><text:span text:style-name="T45"> </text:span><text:span text:style-name="T48">5</text:span><text:span text:style-name="T45"> </text:span><text:span text:style-name="T47">-&gt;</text:span><text:span text:style-name="T45"> </text:span><text:span text:style-name="T53">"Día laborable"</text:span><text:span text:style-name="T49">;</text:span></text:p><text:p text:style-name="P22"><text:span text:style-name="T43">5 <text:s/></text:span><text:span text:style-name="T45"><text:s text:c="4"/></text:span><text:span text:style-name="T44">case</text:span><text:span text:style-name="T45"> </text:span><text:span text:style-name="T48">6</text:span><text:span text:style-name="T49">,</text:span><text:span text:style-name="T45"> </text:span><text:span text:style-name="T48">7</text:span><text:span text:style-name="T45"> </text:span><text:span text:style-name="T47">-&gt;</text:span><text:span text:style-name="T45"> </text:span><text:span text:style-name="T53">"Fin de semana"</text:span><text:span text:style-name="T49">;</text:span></text:p><text:p text:style-name="P22"><text:span text:style-name="T43">6 <text:s/></text:span><text:span text:style-name="T45"><text:s text:c="4"/></text:span><text:span text:style-name="T44">default</text:span><text:span text:style-name="T45"> </text:span><text:span text:style-name="T47">-&gt;</text:span><text:span text:style-name="T45"> </text:span><text:span text:style-name="T53">"Día inválido"</text:span><text:span text:style-name="T49">;</text:span></text:p><text:p text:style-name="P22"><text:span text:style-name="T43">7 <text:s/></text:span><text:span text:style-name="T49">};</text:span></text:p><text:p text:style-name="P23"><text:span text:style-name="T43">8 <text:s/></text:span></text:p><text:p text:style-name="P22"><text:span text:style-name="T43">9 <text:s/></text:span><text:span text:style-name="T46">System</text:span><text:span text:style-name="T49">.</text:span><text:span text:style-name="T51">out</text:span><text:span text:style-name="T49">.</text:span><text:span text:style-name="T51">println</text:span><text:span text:style-name="T49">(</text:span><text:span text:style-name="T46">dayOfWeek</text:span><text:span text:style-name="T49">);</text:span></text:p></draw:text-box></draw:frame><text:span text:style-name="T5"/></text:p>
      <text:p text:style-name="P3"><text:span text:style-name="T5">Todas las ramas de una expresión </text:span><text:span text:style-name="T20">switch</text:span><text:span text:style-name="T5"> que no lancen una excepción deben devolver un tipo de dato consistente (si la expresión </text:span><text:span text:style-name="T20">switch</text:span><text:span text:style-name="T5"> devuelve un valor). Esto significa que si una expresión </text:span><text:span text:style-name="T20">switch</text:span><text:span text:style-name="T5"> está diseñada para devolver un valor, todas las ramas que no terminen en una excepción deben devolver un valor del mismo tipo.</text:span></text:p>
      <text:p text:style-name="P3"><text:span text:style-name="T5"/></text:p>
      <text:p text:style-name="P3"><text:span text:style-name="T5">Se requiere una rama </text:span><text:span text:style-name="T20">default</text:span><text:span text:style-name="T5"> a menos que se cubran todos los casos o que no se devuelva ningún valor. Esto significa que si hay valores posibles para la expresión </text:span><text:span text:style-name="T20">switch</text:span><text:span text:style-name="T5"> que no están cubiertos por ninguna rama </text:span><text:span text:style-name="T20">case</text:span><text:span text:style-name="T5">, se debe incluir una rama </text:span><text:span text:style-name="T20">default</text:span><text:span text:style-name="T5"> para manejar esos casos.</text:span></text:p>
      <text:p text:style-name="P3"><text:span text:style-name="T5"/></text:p>
      <text:p text:style-name="P8"><text:span text:style-name="T5">Si la expresión </text:span><text:span text:style-name="T20">switch</text:span><text:span text:style-name="T5"> devuelve un valor, entonces cada rama que no sea una expresión debe usar la palabra clave </text:span><text:span text:style-name="T20">yield</text:span><text:span text:style-name="T5"> para devolver un valor. </text:span></text:p>
      <text:p text:style-name="P3"><text:span text:style-name="T5"/></text:p>
      <text:p text:style-name="P3"><text:span text:style-name="T11">E</text:span><text:span text:style-name="T5">n el siguiente ejemplo no compila porque los 3 últimos valores devuelven un tipo que no es compatible con el resultado que se espera.</text:span></text:p>
      <text:p text:style-name="P3"><text:span text:style-name="T5"/></text:p>
      <text:p text:style-name="P3"><draw:frame text:anchor-type="paragraph" draw:z-index="16" draw:name="Marco de texto 13" draw:style-name="gr1" draw:text-style-name="P24" svg:width="12.415cm" svg:height="3.654cm" svg:x="0.43cm" svg:y="0.155cm"><draw:text-box><text:p text:style-name="P22"><text:span text:style-name="T43">1 <text:s/></text:span><text:span text:style-name="T44">int</text:span><text:span text:style-name="T45"> </text:span><text:span text:style-name="T46">a1</text:span><text:span text:style-name="T45"> </text:span><text:span text:style-name="T47">=</text:span><text:span text:style-name="T45"> </text:span><text:span text:style-name="T48">10</text:span><text:span text:style-name="T49">;</text:span></text:p><text:p text:style-name="P22"><text:span text:style-name="T43">2 <text:s/></text:span><text:span text:style-name="T44">int</text:span><text:span text:style-name="T45"> </text:span><text:span text:style-name="T46">size</text:span><text:span text:style-name="T45"> </text:span><text:span text:style-name="T46">switch</text:span><text:span text:style-name="T49">(</text:span><text:span text:style-name="T46">a1</text:span><text:span text:style-name="T49">)</text:span><text:span text:style-name="T45"> </text:span><text:span text:style-name="T49">{</text:span></text:p><text:p text:style-name="P22"><text:span text:style-name="T43">3 <text:s/></text:span><text:span text:style-name="T45"><text:s/></text:span><text:span text:style-name="T44">case</text:span><text:span text:style-name="T45"> </text:span><text:span text:style-name="T48">5</text:span><text:span text:style-name="T45"> </text:span><text:span text:style-name="T47">-&gt;</text:span><text:span text:style-name="T45"> </text:span><text:span text:style-name="T48">1</text:span><text:span text:style-name="T49">;</text:span></text:p><text:p text:style-name="P22"><text:span text:style-name="T43">4 <text:s/></text:span><text:span text:style-name="T45"><text:s/></text:span><text:span text:style-name="T44">case</text:span><text:span text:style-name="T45"> </text:span><text:span text:style-name="T48">10</text:span><text:span text:style-name="T45"> </text:span><text:span text:style-name="T47">-&gt;</text:span><text:span text:style-name="T45"> </text:span><text:span text:style-name="T49">(</text:span><text:span text:style-name="T44">short</text:span><text:span text:style-name="T49">)</text:span><text:span text:style-name="T48">2</text:span><text:span text:style-name="T49">;</text:span></text:p><text:p text:style-name="P22"><text:span text:style-name="T43">5 <text:s/></text:span><text:span text:style-name="T45"><text:s/></text:span><text:span text:style-name="T44">default</text:span><text:span text:style-name="T45"> </text:span><text:span text:style-name="T47">-&gt;</text:span><text:span text:style-name="T45"> </text:span><text:span text:style-name="T48">5</text:span><text:span text:style-name="T49">;</text:span></text:p><text:p text:style-name="P22"><text:span text:style-name="T43">6 <text:s/></text:span><text:span text:style-name="T45"><text:s/></text:span><text:span text:style-name="T44">case</text:span><text:span text:style-name="T45"> </text:span><text:span text:style-name="T48">20</text:span><text:span text:style-name="T45"> </text:span><text:span text:style-name="T47">-&gt;</text:span><text:span text:style-name="T45"> </text:span><text:span text:style-name="T53">"3"</text:span><text:span text:style-name="T49">;</text:span><text:span text:style-name="T45"> </text:span><text:span text:style-name="T52">// no compila</text:span></text:p><text:p text:style-name="P22"><text:span text:style-name="T43">7 <text:s/></text:span><text:span text:style-name="T45"><text:s/></text:span><text:span text:style-name="T44">case</text:span><text:span text:style-name="T45"> </text:span><text:span text:style-name="T48">40</text:span><text:span text:style-name="T45"> </text:span><text:span text:style-name="T47">-&gt;</text:span><text:span text:style-name="T45"> </text:span><text:span text:style-name="T48">4L</text:span><text:span text:style-name="T49">;</text:span><text:span text:style-name="T45"> </text:span><text:span text:style-name="T52">// no compila</text:span></text:p><text:p text:style-name="P22"><text:span text:style-name="T43">8 <text:s/></text:span><text:span text:style-name="T45"><text:s/></text:span><text:span text:style-name="T44">case</text:span><text:span text:style-name="T45"> </text:span><text:span text:style-name="T48">50</text:span><text:span text:style-name="T45"> </text:span><text:span text:style-name="T47">-&gt;</text:span><text:span text:style-name="T45"> </text:span><text:span text:style-name="T44">null</text:span><text:span text:style-name="T49">;</text:span><text:span text:style-name="T45"> </text:span><text:span text:style-name="T52">// no compila</text:span></text:p><text:p text:style-name="P22"><text:span text:style-name="T43">9 <text:s/></text:span><text:span text:style-name="T49">}</text:span></text:p></draw:text-box></draw:frame><text:span text:style-name="T5"/></text:p>
      <text:p text:style-name="P3"><text:span text:style-name="T5">Una expresión </text:span><text:span text:style-name="T20">switch</text:span><text:span text:style-name="T5"> admite tanto una expresión como un bloque en las ramas </text:span><text:span text:style-name="T20">case</text:span><text:span text:style-name="T5"> y </text:span><text:span text:style-name="T20">default</text:span><text:span text:style-name="T5">. Al igual que un bloque regular, un bloque case está encerrado entre llaves ({ }). También incluye una instrucción </text:span><text:span text:style-name="T20">yield</text:span><text:span text:style-name="T5"> si la expresión </text:span><text:span text:style-name="T20">switch</text:span><text:span text:style-name="T5"> devuelve un valor. Por ejemplo, el siguiente código utiliza una mezcla de expresiones </text:span><text:span text:style-name="T20">case</text:span><text:span text:style-name="T5"> y bloques:</text:span></text:p>
      <text:p text:style-name="P3"><text:span text:style-name="T5"/></text:p>
      <text:p text:style-name="P3"><text:span text:style-name="T5"/></text:p>
      <text:p text:style-name="P3"><draw:frame text:anchor-type="paragraph" draw:z-index="17" draw:name="Marco de texto 14" draw:style-name="gr1" draw:text-style-name="P24" svg:width="12.415cm" svg:height="4.059cm" svg:x="0.43cm" svg:y="0.155cm"><draw:text-box><text:p text:style-name="P22"><text:span text:style-name="T43"><text:s/></text:span><text:span text:style-name="T43">1 <text:s/></text:span><text:span text:style-name="T44">int</text:span><text:span text:style-name="T45"> </text:span><text:span text:style-name="T46">fish</text:span><text:span text:style-name="T45"> </text:span><text:span text:style-name="T47">=</text:span><text:span text:style-name="T45"> </text:span><text:span text:style-name="T48">5</text:span><text:span text:style-name="T49">;</text:span></text:p><text:p text:style-name="P22"><text:span text:style-name="T43"><text:s/></text:span><text:span text:style-name="T43">2 <text:s/></text:span><text:span text:style-name="T44">int</text:span><text:span text:style-name="T45"> </text:span><text:span text:style-name="T46">length</text:span><text:span text:style-name="T45"> </text:span><text:span text:style-name="T47">=</text:span><text:span text:style-name="T45"> </text:span><text:span text:style-name="T48">12</text:span><text:span text:style-name="T49">;</text:span></text:p><text:p text:style-name="P22"><text:span text:style-name="T43"><text:s/></text:span><text:span text:style-name="T43">3 <text:s/></text:span><text:span text:style-name="T44">var</text:span><text:span text:style-name="T45"> </text:span><text:span text:style-name="T46">name</text:span><text:span text:style-name="T45"> </text:span><text:span text:style-name="T47">=</text:span><text:span text:style-name="T45"> </text:span><text:span text:style-name="T44">switch</text:span><text:span text:style-name="T49">(</text:span><text:span text:style-name="T46">fish</text:span><text:span text:style-name="T49">)</text:span><text:span text:style-name="T45"> </text:span><text:span text:style-name="T49">{</text:span></text:p><text:p text:style-name="P22"><text:span text:style-name="T43"><text:s/></text:span><text:span text:style-name="T43">4 <text:s/></text:span><text:span text:style-name="T45"><text:s text:c="4"/></text:span><text:span text:style-name="T44">case</text:span><text:span text:style-name="T45"> </text:span><text:span text:style-name="T48">1</text:span><text:span text:style-name="T45"> </text:span><text:span text:style-name="T47">-&gt;</text:span><text:span text:style-name="T45"> </text:span><text:span text:style-name="T53">"Goldfish"</text:span><text:span text:style-name="T49">;</text:span></text:p><text:p text:style-name="P22"><text:span text:style-name="T43"><text:s/></text:span><text:span text:style-name="T43">5 <text:s/></text:span><text:span text:style-name="T45"><text:s text:c="4"/></text:span><text:span text:style-name="T44">case</text:span><text:span text:style-name="T45"> </text:span><text:span text:style-name="T48">2</text:span><text:span text:style-name="T45"> </text:span><text:span text:style-name="T47">-&gt;</text:span><text:span text:style-name="T45"> </text:span><text:span text:style-name="T49">{</text:span><text:span text:style-name="T45"> </text:span><text:span text:style-name="T44">yield</text:span><text:span text:style-name="T45"> </text:span><text:span text:style-name="T53">"Trout"</text:span><text:span text:style-name="T49">;</text:span><text:span text:style-name="T45"> </text:span><text:span text:style-name="T49">}</text:span></text:p><text:p text:style-name="P22"><text:span text:style-name="T43"><text:s/></text:span><text:span text:style-name="T43">6 <text:s/></text:span><text:span text:style-name="T45"><text:s text:c="4"/></text:span><text:span text:style-name="T44">case</text:span><text:span text:style-name="T45"> </text:span><text:span text:style-name="T48">3</text:span><text:span text:style-name="T45"> </text:span><text:span text:style-name="T47">-&gt;</text:span><text:span text:style-name="T45"> </text:span><text:span text:style-name="T49">{</text:span></text:p><text:p text:style-name="P22"><text:span text:style-name="T43"><text:s/></text:span><text:span text:style-name="T43">7 <text:s/></text:span><text:span text:style-name="T45"><text:s text:c="8"/></text:span><text:span text:style-name="T44">if</text:span><text:span text:style-name="T45"> </text:span><text:span text:style-name="T49">(</text:span><text:span text:style-name="T46">length</text:span><text:span text:style-name="T45"> </text:span><text:span text:style-name="T47">&gt;</text:span><text:span text:style-name="T45"> </text:span><text:span text:style-name="T48">10</text:span><text:span text:style-name="T49">)</text:span><text:span text:style-name="T45"> </text:span><text:span text:style-name="T44">yield</text:span><text:span text:style-name="T45"> </text:span><text:span text:style-name="T53">"Blobfish"</text:span><text:span text:style-name="T49">;</text:span></text:p><text:p text:style-name="P22"><text:span text:style-name="T43"><text:s/></text:span><text:span text:style-name="T43">8 <text:s/></text:span><text:span text:style-name="T45"><text:s text:c="8"/></text:span><text:span text:style-name="T44">else</text:span><text:span text:style-name="T45"> </text:span><text:span text:style-name="T44">yield</text:span><text:span text:style-name="T45"> </text:span><text:span text:style-name="T53">"Green"</text:span><text:span text:style-name="T49">;</text:span></text:p><text:p text:style-name="P22"><text:span text:style-name="T43"><text:s/></text:span><text:span text:style-name="T43">9 <text:s/></text:span><text:span text:style-name="T45"><text:s text:c="4"/></text:span><text:span text:style-name="T49">}</text:span></text:p><text:p text:style-name="P22"><text:span text:style-name="T43">10 <text:s/></text:span><text:span text:style-name="T49">};</text:span></text:p></draw:text-box></draw:frame><text:soft-page-break/><text:span text:style-name="T5"/></text:p>
      <text:p text:style-name="P3"><text:span text:style-name="T20">yield</text:span><text:span text:style-name="T5">: Se utiliza dentro de un bloque para especificar el valor que se devuelve desde ese caso. Es como una versión de return para las expresiones </text:span><text:span text:style-name="T20">switch</text:span><text:span text:style-name="T5">.</text:span></text:p>
      <text:p text:style-name="P3"><text:span text:style-name="T5"/></text:p>
      <text:p text:style-name="P3"><draw:frame text:anchor-type="paragraph" draw:z-index="18" draw:name="Marco de texto 15" draw:style-name="gr1" draw:text-style-name="P24" svg:width="12.415cm" svg:height="3.654cm" svg:x="0.43cm" svg:y="0.155cm"><draw:text-box><text:p text:style-name="P22"><text:span text:style-name="T43">1 <text:s/></text:span><text:span text:style-name="T44">int</text:span><text:span text:style-name="T45"> </text:span><text:span text:style-name="T46">fish</text:span><text:span text:style-name="T45"> </text:span><text:span text:style-name="T47">=</text:span><text:span text:style-name="T45"> </text:span><text:span text:style-name="T48">5</text:span><text:span text:style-name="T49">;</text:span></text:p><text:p text:style-name="P22"><text:span text:style-name="T43">2 <text:s/></text:span><text:span text:style-name="T44">int</text:span><text:span text:style-name="T45"> </text:span><text:span text:style-name="T46">length</text:span><text:span text:style-name="T45"> </text:span><text:span text:style-name="T47">=</text:span><text:span text:style-name="T45"> </text:span><text:span text:style-name="T48">12</text:span><text:span text:style-name="T49">;</text:span></text:p><text:p text:style-name="P22"><text:span text:style-name="T43">3 <text:s/></text:span><text:span text:style-name="T44">var</text:span><text:span text:style-name="T45"> </text:span><text:span text:style-name="T46">name</text:span><text:span text:style-name="T45"> </text:span><text:span text:style-name="T47">=</text:span><text:span text:style-name="T45"> </text:span><text:span text:style-name="T44">switch</text:span><text:span text:style-name="T49">(</text:span><text:span text:style-name="T46">fish</text:span><text:span text:style-name="T49">)</text:span><text:span text:style-name="T45"> </text:span><text:span text:style-name="T49">{</text:span></text:p><text:p text:style-name="P22"><text:span text:style-name="T43">4 <text:s/></text:span><text:span text:style-name="T45"><text:s/></text:span><text:span text:style-name="T44">case</text:span><text:span text:style-name="T45"> </text:span><text:span text:style-name="T48">1</text:span><text:span text:style-name="T45"> </text:span><text:span text:style-name="T47">-&gt;</text:span><text:span text:style-name="T45"> </text:span><text:span text:style-name="T53">"Goldfish"</text:span><text:span text:style-name="T49">;</text:span></text:p><text:p text:style-name="P22"><text:span text:style-name="T43">5 <text:s/></text:span><text:span text:style-name="T45"><text:s/></text:span><text:span text:style-name="T44">case</text:span><text:span text:style-name="T45"> </text:span><text:span text:style-name="T48">2</text:span><text:span text:style-name="T45"> </text:span><text:span text:style-name="T47">-&gt;</text:span><text:span text:style-name="T45"> </text:span><text:span text:style-name="T49">{}</text:span><text:span text:style-name="T45"> </text:span><text:span text:style-name="T52">// no compila por no utilizar </text:span><text:span text:style-name="T56">yield</text:span></text:p><text:p text:style-name="P22"><text:span text:style-name="T43">6 <text:s/></text:span><text:span text:style-name="T45"><text:s/></text:span><text:span text:style-name="T44">case</text:span><text:span text:style-name="T45"> </text:span><text:span text:style-name="T48">3</text:span><text:span text:style-name="T45"> </text:span><text:span text:style-name="T47">-&gt;</text:span><text:span text:style-name="T45"> </text:span><text:span text:style-name="T49">{</text:span></text:p><text:p text:style-name="P22"><text:span text:style-name="T43">7 <text:s/></text:span><text:span text:style-name="T45"><text:s/></text:span><text:span text:style-name="T44">if</text:span><text:span text:style-name="T49">(</text:span><text:span text:style-name="T46">length</text:span><text:span text:style-name="T45"> </text:span><text:span text:style-name="T47">&gt;</text:span><text:span text:style-name="T45"> </text:span><text:span text:style-name="T48">10</text:span><text:span text:style-name="T49">)</text:span><text:span text:style-name="T45"> </text:span><text:span text:style-name="T44">yield</text:span><text:span text:style-name="T45"> </text:span><text:span text:style-name="T53">"BLod"</text:span><text:span text:style-name="T49">;</text:span></text:p><text:p text:style-name="P22"><text:span text:style-name="T43">8 <text:s/></text:span><text:span text:style-name="T45"><text:s/></text:span><text:span text:style-name="T49">}</text:span><text:span text:style-name="T45"> </text:span><text:span text:style-name="T52">// no compila porque no hay un </text:span><text:span text:style-name="T56">yield</text:span><text:span text:style-name="T52"> por defecto</text:span></text:p><text:p text:style-name="P22"><text:span text:style-name="T43">9 <text:s/></text:span><text:span text:style-name="T49">}</text:span></text:p></draw:text-box></draw:frame><text:span text:style-name="T5"/></text:p>
      <text:p text:style-name="P3"><text:span text:style-name="T5">por ultimo, </text:span><text:span text:style-name="T11">l</text:span><text:span text:style-name="T5">a</text:span><text:span text:style-name="T11">s</text:span><text:span text:style-name="T5"> expresion</text:span><text:span text:style-name="T11">es</text:span><text:span text:style-name="T5"> </text:span><text:span text:style-name="T20">switch</text:span><text:span text:style-name="T5">, indica</text:span><text:span text:style-name="T11">n</text:span><text:span text:style-name="T5"> que todas las posibilidades deban cubrirse </text:span><text:span text:style-name="T11">como </text:span><text:span text:style-name="T5">se evidencia en el siguiente ejemplo:</text:span></text:p>
      <text:p text:style-name="P3"><text:span text:style-name="T5"/></text:p>
      <text:p text:style-name="P3"><draw:frame text:anchor-type="paragraph" draw:z-index="19" draw:name="Marco de texto 16" draw:style-name="gr1" draw:text-style-name="P24" svg:width="12.415cm" svg:height="2.437cm" svg:x="0.43cm" svg:y="0.155cm"><draw:text-box><text:p text:style-name="P22"><text:span text:style-name="T43">1 <text:s/></text:span><text:span text:style-name="T46">String</text:span><text:span text:style-name="T45"> </text:span><text:span text:style-name="T46">type</text:span><text:span text:style-name="T45"> </text:span><text:span text:style-name="T47">=</text:span><text:span text:style-name="T45"> </text:span><text:span text:style-name="T44">switch</text:span><text:span text:style-name="T49">(</text:span><text:span text:style-name="T46">canis</text:span><text:span text:style-name="T49">){</text:span></text:p><text:p text:style-name="P22"><text:span text:style-name="T43">2 <text:s/></text:span><text:span text:style-name="T45"><text:s/></text:span><text:span text:style-name="T44">case</text:span><text:span text:style-name="T45"> </text:span><text:span text:style-name="T48">1</text:span><text:span text:style-name="T45"> </text:span><text:span text:style-name="T47">-&gt;</text:span><text:span text:style-name="T45"> </text:span><text:span text:style-name="T53">"dog"</text:span><text:span text:style-name="T49">;</text:span></text:p><text:p text:style-name="P22"><text:span text:style-name="T43">3 <text:s/></text:span><text:span text:style-name="T45"><text:s/></text:span><text:span text:style-name="T44">case</text:span><text:span text:style-name="T45"> </text:span><text:span text:style-name="T48">2</text:span><text:span text:style-name="T45"> </text:span><text:span text:style-name="T47">-&gt;</text:span><text:span text:style-name="T45"> </text:span><text:span text:style-name="T53">"wolf"</text:span><text:span text:style-name="T49">;</text:span></text:p><text:p text:style-name="P22"><text:span text:style-name="T43">4 <text:s/></text:span><text:span text:style-name="T45"><text:s/></text:span><text:span text:style-name="T44">case</text:span><text:span text:style-name="T45"> </text:span><text:span text:style-name="T48">3</text:span><text:span text:style-name="T45"> </text:span><text:span text:style-name="T47">-&gt;</text:span><text:span text:style-name="T45"> </text:span><text:span text:style-name="T53">"coyote"</text:span><text:span text:style-name="T49">;</text:span></text:p><text:p text:style-name="P22"><text:span text:style-name="T43">5 <text:s/></text:span><text:span text:style-name="T49">};</text:span><text:span text:style-name="T45"> </text:span><text:span text:style-name="T52">// no compila ya que no se considera los caso 5, 4, -1, etc ya que estos van a devolver </text:span><text:span text:style-name="T55">null</text:span><text:span text:style-name="T52">, lo cual no es aceptado por Java</text:span></text:p></draw:text-box></draw:frame><text:span text:style-name="T5"/></text:p>
      <text:p text:style-name="P3"><text:span text:style-name="T5">las posibles soluciones para estos casos son:</text:span></text:p>
      <text:p text:style-name="P3"><text:span text:style-name="T5"/></text:p>
      <text:p text:style-name="P3"><text:span text:style-name="T15">Primera solución (más común)</text:span><text:span text:style-name="T5">: Esta solución se refiere a utilizar la expresión </text:span><text:span text:style-name="T22">default</text:span><text:span text:style-name="T5">.</text:span></text:p>
      <text:p text:style-name="P3"><text:span text:style-name="T5"/></text:p>
      <text:p text:style-name="P8"><text:span text:style-name="T15">Segunda solución</text:span><text:span text:style-name="T5">: Esta solución es más específica para </text:span><text:span text:style-name="T20">enums</text:span><text:span text:style-name="T5">, que son tipos de datos que representan un conjunto fijo de constantes. </text:span></text:p>
      <text:p text:style-name="P8"><text:span text:style-name="T5">Se utiliza cuando queremos evaluar el valor de un </text:span><text:span text:style-name="T20">enum</text:span><text:span text:style-name="T5"> y realizar acciones diferentes según el valor.</text:span></text:p>
      <text:p text:style-name="P3"><text:span text:style-name="T5"/></text:p>
      <text:p text:style-name="P3"><text:span text:style-name="T5"/></text:p>
      <text:p text:style-name="P3"><draw:frame text:anchor-type="paragraph" draw:z-index="20" draw:name="Marco de texto 17" draw:style-name="gr1" draw:text-style-name="P24" svg:width="12.415cm" svg:height="4.059cm" svg:x="0.43cm" svg:y="0.155cm"><draw:text-box><text:p text:style-name="P22"><text:span text:style-name="T43"><text:s/></text:span><text:span text:style-name="T43">1 <text:s/></text:span><text:span text:style-name="T44">enum</text:span><text:span text:style-name="T45"> </text:span><text:span text:style-name="T46">Season</text:span><text:span text:style-name="T45"> </text:span><text:span text:style-name="T49">{</text:span><text:span text:style-name="T46">WINTER</text:span><text:span text:style-name="T49">,</text:span><text:span text:style-name="T45"> </text:span><text:span text:style-name="T46">SPRING</text:span><text:span text:style-name="T49">,</text:span><text:span text:style-name="T45"> </text:span><text:span text:style-name="T46">SUMMER</text:span><text:span text:style-name="T49">,</text:span><text:span text:style-name="T45"> </text:span><text:span text:style-name="T46">FALL</text:span><text:span text:style-name="T49">}</text:span></text:p><text:p text:style-name="P23"><text:span text:style-name="T43"><text:s/></text:span><text:span text:style-name="T43">2 <text:s/></text:span></text:p><text:p text:style-name="P22"><text:span text:style-name="T43"><text:s/></text:span><text:span text:style-name="T43">3 <text:s/></text:span><text:span text:style-name="T46">String</text:span><text:span text:style-name="T45"> </text:span><text:span text:style-name="T46">getWeather</text:span><text:span text:style-name="T49">(</text:span><text:span text:style-name="T46">Season</text:span><text:span text:style-name="T45"> </text:span><text:span text:style-name="T46">value</text:span><text:span text:style-name="T49">)</text:span><text:span text:style-name="T45"> </text:span><text:span text:style-name="T49">{</text:span></text:p><text:p text:style-name="P22"><text:span text:style-name="T43"><text:s/></text:span><text:span text:style-name="T43">4 <text:s/></text:span><text:span text:style-name="T45"><text:s text:c="4"/></text:span><text:span text:style-name="T44">return</text:span><text:span text:style-name="T45"> </text:span><text:span text:style-name="T44">switch</text:span><text:span text:style-name="T49">(</text:span><text:span text:style-name="T46">value</text:span><text:span text:style-name="T49">)</text:span><text:span text:style-name="T45"> </text:span><text:span text:style-name="T49">{</text:span></text:p><text:p text:style-name="P22"><text:span text:style-name="T43"><text:s/></text:span><text:span text:style-name="T43">5 <text:s/></text:span><text:span text:style-name="T45"><text:s text:c="8"/></text:span><text:span text:style-name="T44">case</text:span><text:span text:style-name="T45"> </text:span><text:span text:style-name="T46">WINTER</text:span><text:span text:style-name="T45"> </text:span><text:span text:style-name="T47">-&gt;</text:span><text:span text:style-name="T45"> </text:span><text:span text:style-name="T53">"Cold"</text:span><text:span text:style-name="T49">,</text:span></text:p><text:p text:style-name="P22"><text:span text:style-name="T43"><text:s/></text:span><text:span text:style-name="T43">6 <text:s/></text:span><text:span text:style-name="T45"><text:s text:c="8"/></text:span><text:span text:style-name="T44">case</text:span><text:span text:style-name="T45"> </text:span><text:span text:style-name="T46">SPRING</text:span><text:span text:style-name="T45"> </text:span><text:span text:style-name="T47">-&gt;</text:span><text:span text:style-name="T45"> </text:span><text:span text:style-name="T53">"Rainy"</text:span><text:span text:style-name="T49">,</text:span></text:p><text:p text:style-name="P22"><text:span text:style-name="T43"><text:s/></text:span><text:span text:style-name="T43">7 <text:s/></text:span><text:span text:style-name="T45"><text:s text:c="8"/></text:span><text:span text:style-name="T44">case</text:span><text:span text:style-name="T45"> </text:span><text:span text:style-name="T46">SUMMER</text:span><text:span text:style-name="T45"> </text:span><text:span text:style-name="T47">-&gt;</text:span><text:span text:style-name="T45"> </text:span><text:span text:style-name="T53">"Hot"</text:span><text:span text:style-name="T49">,</text:span></text:p><text:p text:style-name="P22"><text:span text:style-name="T43"><text:s/></text:span><text:span text:style-name="T43">8 <text:s/></text:span><text:span text:style-name="T45"><text:s text:c="8"/></text:span><text:span text:style-name="T44">case</text:span><text:span text:style-name="T45"> </text:span><text:span text:style-name="T46">FALL</text:span><text:span text:style-name="T45"> </text:span><text:span text:style-name="T47">-&gt;</text:span><text:span text:style-name="T45"> </text:span><text:span text:style-name="T53">"Warm"</text:span></text:p><text:p text:style-name="P22"><text:span text:style-name="T43"><text:s/></text:span><text:span text:style-name="T43">9 <text:s/></text:span><text:span text:style-name="T45"><text:s text:c="4"/></text:span><text:span text:style-name="T49">};</text:span></text:p><text:p text:style-name="P22"><text:span text:style-name="T43">10 <text:s/></text:span><text:span text:style-name="T49">}</text:span></text:p></draw:text-box></draw:frame><text:span text:style-name="T5"/></text:p>
      <text:p text:style-name="P18"><text:span text:style-name="T30">Loops en Java</text:span><text:span text:style-name="T5">: </text:span><text:span text:style-name="T12">se realizan a través de la sentencia </text:span><text:span text:style-name="T20">while</text:span><text:span text:style-name="T12">, durante la ejecución se debe aumentar el contador de la condición</text:span></text:p>
      <text:p text:style-name="P3"><text:span text:style-name="T5"/></text:p>
      <text:p text:style-name="P3"><draw:frame draw:style-name="fr2" draw:name="Imagen5" text:anchor-type="char" svg:width="10.218cm" svg:height="3.658cm" draw:z-index="21"><draw:image xlink:href="Pictures/10000000000002D6000001043ADE618B.jpg" xlink:type="simple" xlink:show="embed" xlink:actuate="onLoad" draw:mime-type="image/jpeg"/></draw:frame><text:span text:style-name="T5"/></text:p>
      <text:p text:style-name="P3"><text:span text:style-name="T5"/></text:p>
      <text:p text:style-name="P3"><text:span text:style-name="T16">do-while</text:span><text:span text:style-name="T5"> es un tipo de sentencia loop que permite una primera ejecución de código </text:span></text:p>
      <text:p text:style-name="P3"><text:span text:style-name="T5"/></text:p>
      <text:p text:style-name="P3"><draw:frame draw:style-name="fr4" draw:name="Imagen6" text:anchor-type="char" svg:width="10.827cm" svg:height="4.875cm" draw:z-index="22"><draw:image xlink:href="Pictures/10000000000002D600000147A3F77104.jpg" xlink:type="simple" xlink:show="embed" xlink:actuate="onLoad" draw:mime-type="image/jpeg"/></draw:frame><text:span text:style-name="T5"/></text:p>
      <text:p text:style-name="P3"><text:span text:style-name="T5"/></text:p>
      <text:p text:style-name="P19"><text:span text:style-name="T15">for-loop</text:span><text:span text:style-name="T5"> <text:s/></text:span><text:span text:style-name="T12">es un tipo de loop que permite ejecutarse para una cantidad especifica de repeticiones </text:span></text:p>
      <text:p text:style-name="P3"><text:span text:style-name="T5"/></text:p>
      <text:p text:style-name="P3"><text:span text:style-name="T5"/></text:p>
      <text:p text:style-name="P3"><draw:frame draw:style-name="fr3" draw:name="Imagen7" text:anchor-type="char" svg:width="8.513cm" svg:height="3.138cm" draw:z-index="23"><draw:image xlink:href="Pictures/10000000000002D600000166342A734B.jpg" xlink:type="simple" xlink:show="embed" xlink:actuate="onLoad" draw:mime-type="image/jpeg"/></draw:frame><text:soft-page-break/><text:span text:style-name="T5"/></text:p>
      <text:p text:style-name="P3"><text:span text:style-name="T5"/></text:p>
      <text:p text:style-name="P3"><draw:frame text:anchor-type="paragraph" draw:z-index="24" draw:name="Marco de texto 18" draw:style-name="gr1" draw:text-style-name="P24" svg:width="12.415cm" svg:height="1.625cm" svg:x="0.43cm" svg:y="0.155cm"><draw:text-box><text:p text:style-name="P22"><text:span text:style-name="T43">1 <text:s/></text:span><text:span text:style-name="T44">for</text:span><text:span text:style-name="T45"> </text:span><text:span text:style-name="T49">(</text:span><text:span text:style-name="T44">int</text:span><text:span text:style-name="T45"> </text:span><text:span text:style-name="T46">i</text:span><text:span text:style-name="T45"> </text:span><text:span text:style-name="T47">=</text:span><text:span text:style-name="T45"> </text:span><text:span text:style-name="T48">0</text:span><text:span text:style-name="T49">;</text:span><text:span text:style-name="T45"> </text:span><text:span text:style-name="T46">i</text:span><text:span text:style-name="T45"> </text:span><text:span text:style-name="T47">&lt;</text:span><text:span text:style-name="T45"> </text:span><text:span text:style-name="T48">10</text:span><text:span text:style-name="T49">;</text:span><text:span text:style-name="T45"> </text:span><text:span text:style-name="T46">i</text:span><text:span text:style-name="T47">++</text:span><text:span text:style-name="T49">)</text:span><text:span text:style-name="T45"> </text:span><text:span text:style-name="T49">{</text:span></text:p><text:p text:style-name="P22"><text:span text:style-name="T43">2 <text:s/></text:span><text:span text:style-name="T45"><text:s text:c="2"/></text:span><text:span text:style-name="T46">System</text:span><text:span text:style-name="T49">.</text:span><text:span text:style-name="T51">out</text:span><text:span text:style-name="T49">.</text:span><text:span text:style-name="T51">println</text:span><text:span text:style-name="T49">(</text:span><text:span text:style-name="T53">"a"</text:span><text:span text:style-name="T45"> </text:span><text:span text:style-name="T47">+</text:span><text:span text:style-name="T45"> </text:span><text:span text:style-name="T46">i</text:span><text:span text:style-name="T49">);</text:span><text:span text:style-name="T45"> </text:span><text:span text:style-name="T52">// en estos loops la primera impresión sera a0, no a1 ya que después de imprimir recién ejecuta el incremento en "i"</text:span></text:p><text:p text:style-name="P22"><text:span text:style-name="T43">3 <text:s/></text:span><text:span text:style-name="T49">}</text:span></text:p></draw:text-box></draw:frame><text:span text:style-name="T5"/></text:p>
      <text:p text:style-name="P3"><text:span text:style-name="T5"/></text:p>
      <text:p text:style-name="P3"><text:span text:style-name="T5">- LOOP infinito</text:span></text:p>
      <text:p text:style-name="P3"><text:span text:style-name="T5"/></text:p>
      <text:p text:style-name="P3"><draw:frame text:anchor-type="paragraph" draw:z-index="25" draw:name="Marco de texto 19" draw:style-name="gr2" draw:text-style-name="P24" svg:width="12.415cm" svg:height="0.989cm" svg:x="0.43cm" svg:y="0.155cm"><draw:text-box><text:p text:style-name="P22"><text:span text:style-name="T43">1 <text:s/></text:span><text:span text:style-name="T44">for</text:span><text:span text:style-name="T49">(;;)</text:span></text:p><text:p text:style-name="P22"><text:span text:style-name="T43">2 <text:s/></text:span><text:span text:style-name="T45"><text:s/></text:span><text:span text:style-name="T46">System</text:span><text:span text:style-name="T49">.</text:span><text:span text:style-name="T51">out</text:span><text:span text:style-name="T49">.</text:span><text:span text:style-name="T51">println</text:span><text:span text:style-name="T49">(</text:span><text:span text:style-name="T53">"hola mundo"</text:span><text:span text:style-name="T49">);</text:span><text:span text:style-name="T45"> </text:span><text:span text:style-name="T52">// esto si compilara</text:span></text:p></draw:text-box></draw:frame><text:span text:style-name="T5"/></text:p>
      <text:p text:style-name="P3"><text:span text:style-name="T5">- agregando múltiples parámetros al </text:span><text:span text:style-name="T23">for</text:span><text:span text:style-name="T5"> (si compila)</text:span></text:p>
      <text:p text:style-name="P3"><text:span text:style-name="T5"/></text:p>
      <text:p text:style-name="P3"><draw:frame text:anchor-type="paragraph" draw:z-index="26" draw:name="Marco de texto 20" draw:style-name="gr1" draw:text-style-name="P24" svg:width="12.415cm" svg:height="2.031cm" svg:x="0.43cm" svg:y="0.155cm"><draw:text-box><text:p text:style-name="P22"><text:span text:style-name="T43">1 <text:s/></text:span><text:span text:style-name="T44">int</text:span><text:span text:style-name="T45"> </text:span><text:span text:style-name="T46">x</text:span><text:span text:style-name="T45"> </text:span><text:span text:style-name="T47">=</text:span><text:span text:style-name="T45"> </text:span><text:span text:style-name="T48">0</text:span><text:span text:style-name="T49">;</text:span></text:p><text:p text:style-name="P22"><text:span text:style-name="T43">2 <text:s/></text:span><text:span text:style-name="T44">for</text:span><text:span text:style-name="T49">(</text:span><text:span text:style-name="T44">long</text:span><text:span text:style-name="T45"> </text:span><text:span text:style-name="T46">y</text:span><text:span text:style-name="T45"> </text:span><text:span text:style-name="T47">=</text:span><text:span text:style-name="T45"> </text:span><text:span text:style-name="T48">0</text:span><text:span text:style-name="T49">,</text:span><text:span text:style-name="T45"> </text:span><text:span text:style-name="T46">z</text:span><text:span text:style-name="T45"> </text:span><text:span text:style-name="T47">=</text:span><text:span text:style-name="T45"> </text:span><text:span text:style-name="T48">4</text:span><text:span text:style-name="T49">;</text:span><text:span text:style-name="T45"> </text:span><text:span text:style-name="T46">x</text:span><text:span text:style-name="T45"> </text:span><text:span text:style-name="T47">&lt;</text:span><text:span text:style-name="T45"> </text:span><text:span text:style-name="T48">5</text:span><text:span text:style-name="T45"> </text:span><text:span text:style-name="T47">&amp;&amp;</text:span><text:span text:style-name="T45"> </text:span><text:span text:style-name="T46">y</text:span><text:span text:style-name="T45"> </text:span><text:span text:style-name="T47">&lt;</text:span><text:span text:style-name="T45"> </text:span><text:span text:style-name="T48">10</text:span><text:span text:style-name="T49">;</text:span><text:span text:style-name="T45"> </text:span><text:span text:style-name="T46">x</text:span><text:span text:style-name="T47">++</text:span><text:span text:style-name="T49">,</text:span><text:span text:style-name="T45"> </text:span><text:span text:style-name="T46">y</text:span><text:span text:style-name="T47">++</text:span><text:span text:style-name="T49">){</text:span></text:p><text:p text:style-name="P22"><text:span text:style-name="T43">3 <text:s/></text:span><text:span text:style-name="T45"><text:s/></text:span><text:span text:style-name="T46">System</text:span><text:span text:style-name="T49">.</text:span><text:span text:style-name="T51">out</text:span><text:span text:style-name="T49">.</text:span><text:span text:style-name="T51">println</text:span><text:span text:style-name="T49">(</text:span><text:span text:style-name="T46">y</text:span><text:span text:style-name="T45"> </text:span><text:span text:style-name="T47">+</text:span><text:span text:style-name="T45"> </text:span><text:span text:style-name="T53">""</text:span><text:span text:style-name="T49">);</text:span></text:p><text:p text:style-name="P22"><text:span text:style-name="T43">4 <text:s/></text:span><text:span text:style-name="T49">}</text:span></text:p><text:p text:style-name="P22"><text:span text:style-name="T43">5 <text:s/></text:span><text:span text:style-name="T46">System</text:span><text:span text:style-name="T49">.</text:span><text:span text:style-name="T51">out</text:span><text:span text:style-name="T49">.</text:span><text:span text:style-name="T51">println</text:span><text:span text:style-name="T49">(</text:span><text:span text:style-name="T46">x</text:span><text:span text:style-name="T45"> </text:span><text:span text:style-name="T47">+</text:span><text:span text:style-name="T45"> </text:span><text:span text:style-name="T53">""</text:span><text:span text:style-name="T49">);</text:span></text:p></draw:text-box></draw:frame><text:span text:style-name="T5"/></text:p>
      <text:p text:style-name="P3"><text:span text:style-name="T5">- redefiniendo una variable en el bloque inicial</text:span></text:p>
      <text:p text:style-name="P3"><text:span text:style-name="T5"/></text:p>
      <text:p text:style-name="P3"><draw:frame text:anchor-type="paragraph" draw:z-index="27" draw:name="Marco de texto 21" draw:style-name="gr1" draw:text-style-name="P24" svg:width="12.415cm" svg:height="1.625cm" svg:x="0.43cm" svg:y="0.155cm"><draw:text-box><text:p text:style-name="P22"><text:span text:style-name="T43">1 <text:s/></text:span><text:span text:style-name="T44">int</text:span><text:span text:style-name="T45"> </text:span><text:span text:style-name="T46">x</text:span><text:span text:style-name="T45"> </text:span><text:span text:style-name="T47">=</text:span><text:span text:style-name="T45"> </text:span><text:span text:style-name="T48">0</text:span><text:span text:style-name="T49">;</text:span></text:p><text:p text:style-name="P22"><text:span text:style-name="T43">2 <text:s/></text:span><text:span text:style-name="T44">for</text:span><text:span text:style-name="T45"> </text:span><text:span text:style-name="T49">(</text:span><text:span text:style-name="T44">int</text:span><text:span text:style-name="T45"> </text:span><text:span text:style-name="T46">x</text:span><text:span text:style-name="T45"> </text:span><text:span text:style-name="T47">=</text:span><text:span text:style-name="T45"> </text:span><text:span text:style-name="T48">4</text:span><text:span text:style-name="T49">;</text:span><text:span text:style-name="T45"> </text:span><text:span text:style-name="T46">x</text:span><text:span text:style-name="T45"> </text:span><text:span text:style-name="T47">&lt;</text:span><text:span text:style-name="T45"> </text:span><text:span text:style-name="T48">5</text:span><text:span text:style-name="T49">;</text:span><text:span text:style-name="T45"> </text:span><text:span text:style-name="T46">x</text:span><text:span text:style-name="T47">++</text:span><text:span text:style-name="T49">){</text:span></text:p><text:p text:style-name="P22"><text:span text:style-name="T43">3 <text:s/></text:span><text:span text:style-name="T45"><text:s/></text:span><text:span text:style-name="T46">System</text:span><text:span text:style-name="T49">.</text:span><text:span text:style-name="T51">out</text:span><text:span text:style-name="T49">.</text:span><text:span text:style-name="T51">println</text:span><text:span text:style-name="T49">(</text:span><text:span text:style-name="T53">"hola mundo"</text:span><text:span text:style-name="T49">);</text:span><text:span text:style-name="T45"> </text:span><text:span text:style-name="T52">// no compila, la variable ya fue declarada</text:span></text:p><text:p text:style-name="P22"><text:span text:style-name="T43">4 <text:s/></text:span><text:span text:style-name="T49">}</text:span></text:p></draw:text-box></draw:frame><text:span text:style-name="T5"/></text:p>
      <text:p text:style-name="P3"><text:span text:style-name="T5">- utilizando tipos de dato incompatibles</text:span></text:p>
      <text:p text:style-name="P3"><text:span text:style-name="T5"/></text:p>
      <text:p text:style-name="P3"><draw:frame text:anchor-type="paragraph" draw:z-index="28" draw:name="Marco de texto 22" draw:style-name="gr1" draw:text-style-name="P24" svg:width="12.415cm" svg:height="2.031cm" svg:x="0.43cm" svg:y="0.155cm"><draw:text-box><text:p text:style-name="P22"><text:span text:style-name="T43">1 <text:s/></text:span><text:span text:style-name="T44">int</text:span><text:span text:style-name="T45"> </text:span><text:span text:style-name="T46">x</text:span><text:span text:style-name="T45"> </text:span><text:span text:style-name="T47">=</text:span><text:span text:style-name="T45"> </text:span><text:span text:style-name="T48">0</text:span><text:span text:style-name="T49">;</text:span></text:p><text:p text:style-name="P22"><text:span text:style-name="T43">2 <text:s/></text:span><text:span text:style-name="T44">for</text:span><text:span text:style-name="T45"> </text:span><text:span text:style-name="T49">(</text:span><text:span text:style-name="T44">long</text:span><text:span text:style-name="T45"> </text:span><text:span text:style-name="T46">y</text:span><text:span text:style-name="T45"> </text:span><text:span text:style-name="T47">=</text:span><text:span text:style-name="T45"> </text:span><text:span text:style-name="T48">0</text:span><text:span text:style-name="T49">,</text:span><text:span text:style-name="T45"> </text:span><text:span text:style-name="T44">int</text:span><text:span text:style-name="T45"> </text:span><text:span text:style-name="T46">z</text:span><text:span text:style-name="T45"> </text:span><text:span text:style-name="T47">=</text:span><text:span text:style-name="T45"> </text:span><text:span text:style-name="T48">4</text:span><text:span text:style-name="T49">,</text:span><text:span text:style-name="T45"> </text:span><text:span text:style-name="T46">x</text:span><text:span text:style-name="T45"> </text:span><text:span text:style-name="T47">&lt;</text:span><text:span text:style-name="T45"> </text:span><text:span text:style-name="T48">5</text:span><text:span text:style-name="T49">;</text:span><text:span text:style-name="T45"> </text:span><text:span text:style-name="T46">x</text:span><text:span text:style-name="T47">++</text:span><text:span text:style-name="T49">){</text:span><text:span text:style-name="T45"> </text:span><text:span text:style-name="T52">// no compila, todas las variables en el bloque de iniciación deben ser del mismo tipo</text:span></text:p><text:p text:style-name="P22"><text:span text:style-name="T43">3 <text:s/></text:span><text:span text:style-name="T45"><text:s/></text:span><text:span text:style-name="T46">System</text:span><text:span text:style-name="T49">.</text:span><text:span text:style-name="T51">out</text:span><text:span text:style-name="T49">.</text:span><text:span text:style-name="T51">println</text:span><text:span text:style-name="T49">(</text:span><text:span text:style-name="T46">y</text:span><text:span text:style-name="T45"> </text:span><text:span text:style-name="T47">+</text:span><text:span text:style-name="T45"> </text:span><text:span text:style-name="T53">""</text:span><text:span text:style-name="T49">);</text:span></text:p><text:p text:style-name="P22"><text:span text:style-name="T43">4 <text:s/></text:span><text:span text:style-name="T49">}</text:span></text:p></draw:text-box></draw:frame><text:span text:style-name="T5"/></text:p>
      <text:p text:style-name="P3"><text:span text:style-name="T5">- utilizando variables del loop fuera de el</text:span></text:p>
      <text:p text:style-name="P3"><text:span text:style-name="T5"/></text:p>
      <text:p text:style-name="P3"><draw:frame text:anchor-type="paragraph" draw:z-index="29" draw:name="Marco de texto 23" draw:style-name="gr1" draw:text-style-name="P24" svg:width="12.415cm" svg:height="1.625cm" svg:x="0.43cm" svg:y="0.155cm"><draw:text-box><text:p text:style-name="P22"><text:span text:style-name="T43">1 <text:s/></text:span><text:span text:style-name="T44">for</text:span><text:span text:style-name="T45"> </text:span><text:span text:style-name="T49">(</text:span><text:span text:style-name="T44">long</text:span><text:span text:style-name="T45"> </text:span><text:span text:style-name="T46">y</text:span><text:span text:style-name="T45"> </text:span><text:span text:style-name="T47">=</text:span><text:span text:style-name="T45"> </text:span><text:span text:style-name="T48">0</text:span><text:span text:style-name="T49">,</text:span><text:span text:style-name="T45"> </text:span><text:span text:style-name="T46">x</text:span><text:span text:style-name="T45"> </text:span><text:span text:style-name="T47">=</text:span><text:span text:style-name="T45"> </text:span><text:span text:style-name="T48">4</text:span><text:span text:style-name="T49">;</text:span><text:span text:style-name="T45"> </text:span><text:span text:style-name="T46">x</text:span><text:span text:style-name="T45"> </text:span><text:span text:style-name="T47">&lt;</text:span><text:span text:style-name="T45"> </text:span><text:span text:style-name="T48">5</text:span><text:span text:style-name="T45"> </text:span><text:span text:style-name="T47">&amp;&amp;</text:span><text:span text:style-name="T45"> </text:span><text:span text:style-name="T46">y</text:span><text:span text:style-name="T45"> </text:span><text:span text:style-name="T47">&lt;</text:span><text:span text:style-name="T45"> </text:span><text:span text:style-name="T48">10</text:span><text:span text:style-name="T49">;</text:span><text:span text:style-name="T45"> </text:span><text:span text:style-name="T46">x</text:span><text:span text:style-name="T47">++</text:span><text:span text:style-name="T49">,</text:span><text:span text:style-name="T45"> </text:span><text:span text:style-name="T46">y</text:span><text:span text:style-name="T47">++</text:span><text:span text:style-name="T49">)</text:span></text:p><text:p text:style-name="P22"><text:span text:style-name="T43">2 <text:s/></text:span><text:span text:style-name="T45"><text:s/></text:span><text:span text:style-name="T46">System</text:span><text:span text:style-name="T49">.</text:span><text:span text:style-name="T51">out</text:span><text:span text:style-name="T49">.</text:span><text:span text:style-name="T51">println</text:span><text:span text:style-name="T49">(</text:span><text:span text:style-name="T46">y</text:span><text:span text:style-name="T45"> </text:span><text:span text:style-name="T47">+</text:span><text:span text:style-name="T45"> </text:span><text:span text:style-name="T53">""</text:span><text:span text:style-name="T49">);</text:span></text:p><text:p text:style-name="P22"><text:span text:style-name="T43">3 <text:s/></text:span><text:span text:style-name="T46">System</text:span><text:span text:style-name="T49">.</text:span><text:span text:style-name="T51">out</text:span><text:span text:style-name="T49">.</text:span><text:span text:style-name="T51">println</text:span><text:span text:style-name="T49">(</text:span><text:span text:style-name="T46">x</text:span><text:span text:style-name="T49">);</text:span><text:span text:style-name="T45"> </text:span><text:span text:style-name="T52">// no compila porque se usa una variable que solo vive en el loop.</text:span></text:p></draw:text-box></draw:frame><text:span text:style-name="T5"/></text:p>
      <text:p text:style-name="P3"><text:span text:style-name="T17">for-each</text:span><text:span text:style-name="T15"> </text:span><text:span text:style-name="T17">loop</text:span><text:span text:style-name="T5">: es un loop especializado en recorrer </text:span><text:span text:style-name="T20">Arrays</text:span><text:span text:style-name="T5"> y otras clases de tipo </text:span><text:span text:style-name="T20">Collection</text:span><text:span text:style-name="T5">.</text:span></text:p>
      <text:p text:style-name="P3"><text:span text:style-name="T5"/></text:p>
      <text:p text:style-name="P3"><draw:frame draw:style-name="fr1" draw:name="Imagen8" text:anchor-type="char" svg:width="11.943cm" svg:height="4.62cm" draw:z-index="30"><draw:image xlink:href="Pictures/10000000000002D90000011A676C4DB9.jpg" xlink:type="simple" xlink:show="embed" xlink:actuate="onLoad" draw:mime-type="image/jpeg"/></draw:frame><text:span text:style-name="T5"/></text:p>
      <text:p text:style-name="P3"><text:span text:style-name="T5">La declaración de un bucle </text:span><text:span text:style-name="T20">for-each</text:span><text:span text:style-name="T5"> se compone de una sección de inicialización y un objeto sobre el que iterar. El lado derecho del bucle </text:span><text:span text:style-name="T20">for-each</text:span><text:span text:style-name="T5"> debe ser uno de los siguientes:</text:span></text:p>
      <text:p text:style-name="P3"><text:span text:style-name="T5"/></text:p>
      <text:list text:style-name="L2">
        <text:list-item>
          <text:p text:style-name="P9"><text:span text:style-name="T5">Un arreglo de Java integrado.</text:span></text:p>
        </text:list-item>
        <text:list-item>
          <text:p text:style-name="P9"><text:span text:style-name="T5">Un objeto cuyo tipo implemente java.lang.Iterable (o extienda de la interfaz Collection)</text:span></text:p>
        </text:list-item>
      </text:list>
      <text:p text:style-name="P3"><text:span text:style-name="T5"/></text:p>
      <text:p text:style-name="P3"><text:span text:style-name="T5">El lado izquierdo debe incluir una declaración para una instancia de una variable cuyo tipo sea compatible con el tipo del arreglo o colección en el lado derecho de la declaración.</text:span></text:p>
      <text:p text:style-name="P3"><text:span text:style-name="T5"/></text:p>
      <text:p text:style-name="P3"><draw:frame text:anchor-type="paragraph" draw:z-index="31" draw:name="Marco de texto 24" draw:style-name="gr1" draw:text-style-name="P24" svg:width="12.415cm" svg:height="4.465cm" svg:x="0.43cm" svg:y="0.155cm"><draw:text-box><text:p text:style-name="P22"><text:span text:style-name="T43"><text:s/></text:span><text:span text:style-name="T43">1 <text:s/></text:span><text:span text:style-name="T44">public</text:span><text:span text:style-name="T45"> </text:span><text:span text:style-name="T44">void</text:span><text:span text:style-name="T45"> </text:span><text:span text:style-name="T46">printNames</text:span><text:span text:style-name="T49">(</text:span><text:span text:style-name="T46">String</text:span><text:span text:style-name="T47">[]</text:span><text:span text:style-name="T45"> </text:span><text:span text:style-name="T46">names</text:span><text:span text:style-name="T49">)</text:span><text:span text:style-name="T45"> </text:span><text:span text:style-name="T49">{</text:span></text:p><text:p text:style-name="P22"><text:span text:style-name="T43"><text:s/></text:span><text:span text:style-name="T43">2 <text:s/></text:span><text:span text:style-name="T45"><text:s text:c="4"/></text:span><text:span text:style-name="T44">for</text:span><text:span text:style-name="T49">(</text:span><text:span text:style-name="T44">int</text:span><text:span text:style-name="T45"> </text:span><text:span text:style-name="T46">counter</text:span><text:span text:style-name="T45"> </text:span><text:span text:style-name="T47">=</text:span><text:span text:style-name="T45"> </text:span><text:span text:style-name="T48">0</text:span><text:span text:style-name="T49">;</text:span><text:span text:style-name="T45"> </text:span><text:span text:style-name="T46">counter</text:span><text:span text:style-name="T45"> </text:span><text:span text:style-name="T47">&lt;</text:span><text:span text:style-name="T45"> </text:span><text:span text:style-name="T46">names</text:span><text:span text:style-name="T49">.</text:span><text:span text:style-name="T51">length</text:span><text:span text:style-name="T49">;</text:span><text:span text:style-name="T45"> </text:span><text:span text:style-name="T46">counter</text:span><text:span text:style-name="T47">++</text:span><text:span text:style-name="T49">)</text:span><text:span text:style-name="T45"> </text:span><text:span text:style-name="T49">{</text:span></text:p><text:p text:style-name="P22"><text:span text:style-name="T43"><text:s/></text:span><text:span text:style-name="T43">3 <text:s/></text:span><text:span text:style-name="T45"><text:s text:c="8"/></text:span><text:span text:style-name="T46">System</text:span><text:span text:style-name="T49">.</text:span><text:span text:style-name="T51">out</text:span><text:span text:style-name="T49">.</text:span><text:span text:style-name="T51">println</text:span><text:span text:style-name="T49">(</text:span><text:span text:style-name="T46">names</text:span><text:span text:style-name="T47">[</text:span><text:span text:style-name="T46">counter</text:span><text:span text:style-name="T47">]</text:span><text:span text:style-name="T49">);</text:span></text:p><text:p text:style-name="P22"><text:span text:style-name="T43"><text:s/></text:span><text:span text:style-name="T43">4 <text:s/></text:span><text:span text:style-name="T45"><text:s text:c="4"/></text:span><text:span text:style-name="T49">}</text:span></text:p><text:p text:style-name="P22"><text:span text:style-name="T43"><text:s/></text:span><text:span text:style-name="T43">5 <text:s/></text:span><text:span text:style-name="T49">}</text:span></text:p><text:p text:style-name="P23"><text:span text:style-name="T43"><text:s/></text:span><text:span text:style-name="T43">6 <text:s/></text:span></text:p><text:p text:style-name="P22"><text:span text:style-name="T43"><text:s/></text:span><text:span text:style-name="T43">7 <text:s/></text:span><text:span text:style-name="T44">public</text:span><text:span text:style-name="T45"> </text:span><text:span text:style-name="T44">void</text:span><text:span text:style-name="T45"> </text:span><text:span text:style-name="T46">printNames</text:span><text:span text:style-name="T49">(</text:span><text:span text:style-name="T46">String</text:span><text:span text:style-name="T47">[]</text:span><text:span text:style-name="T45"> </text:span><text:span text:style-name="T46">names</text:span><text:span text:style-name="T49">)</text:span><text:span text:style-name="T45"> </text:span><text:span text:style-name="T49">{</text:span></text:p><text:p text:style-name="P22"><text:span text:style-name="T43"><text:s/></text:span><text:span text:style-name="T43">8 <text:s/></text:span><text:span text:style-name="T45"><text:s text:c="4"/></text:span><text:span text:style-name="T44">for</text:span><text:span text:style-name="T49">(</text:span><text:span text:style-name="T44">var</text:span><text:span text:style-name="T45"> </text:span><text:span text:style-name="T46">name</text:span><text:span text:style-name="T45"> </text:span><text:span text:style-name="T49">:</text:span><text:span text:style-name="T45"> </text:span><text:span text:style-name="T46">names</text:span><text:span text:style-name="T49">)</text:span><text:span text:style-name="T45"> </text:span><text:span text:style-name="T49">{</text:span></text:p><text:p text:style-name="P22"><text:span text:style-name="T43"><text:s/></text:span><text:span text:style-name="T43">9 <text:s/></text:span><text:span text:style-name="T45"><text:s text:c="8"/></text:span><text:span text:style-name="T46">System</text:span><text:span text:style-name="T49">.</text:span><text:span text:style-name="T51">out</text:span><text:span text:style-name="T49">.</text:span><text:span text:style-name="T51">println</text:span><text:span text:style-name="T49">(</text:span><text:span text:style-name="T46">name</text:span><text:span text:style-name="T49">);</text:span></text:p><text:p text:style-name="P22"><text:span text:style-name="T43">10 <text:s/></text:span><text:span text:style-name="T45"><text:s text:c="4"/></text:span><text:span text:style-name="T49">}</text:span></text:p><text:p text:style-name="P22"><text:span text:style-name="T43">11 <text:s/></text:span><text:span text:style-name="T49">}</text:span></text:p></draw:text-box></draw:frame><text:span text:style-name="T5"/></text:p>
      <text:p text:style-name="P3"><text:span text:style-name="T5"/></text:p>
      <text:p text:style-name="P3"><text:span text:style-name="T5"/></text:p>
      <text:p text:style-name="P3"><text:soft-page-break/><text:span text:style-name="T30">bu</text:span><text:span text:style-name="T33">c</text:span><text:span text:style-name="T30">les anidados</text:span><text:span text:style-name="T5">: Un bucle anidado es un bucle que contiene otro bucle, incluyendo bucles while, do/while, for y for-each. Por ejemplo, considera el siguiente código que itera sobre un arreglo bidimensional, que es un arreglo que contiene otros arreglos como sus miembros.</text:span></text:p>
      <text:p text:style-name="P3"><text:span text:style-name="T5"/></text:p>
      <text:p text:style-name="P3"><draw:frame text:anchor-type="paragraph" draw:z-index="32" draw:name="Marco de texto 25" draw:style-name="gr1" draw:text-style-name="P24" svg:width="12.415cm" svg:height="2.842cm" svg:x="0.43cm" svg:y="0.155cm"><draw:text-box><text:p text:style-name="P22"><text:span text:style-name="T43">1 <text:s/></text:span><text:span text:style-name="T44">int</text:span><text:span text:style-name="T47">[][]</text:span><text:span text:style-name="T45"> </text:span><text:span text:style-name="T46">myComplexArray</text:span><text:span text:style-name="T45"> </text:span><text:span text:style-name="T47">=</text:span><text:span text:style-name="T45"> </text:span><text:span text:style-name="T49">{{</text:span><text:span text:style-name="T48">5</text:span><text:span text:style-name="T49">,</text:span><text:span text:style-name="T48">2</text:span><text:span text:style-name="T49">,</text:span><text:span text:style-name="T48">1</text:span><text:span text:style-name="T49">,</text:span><text:span text:style-name="T48">3</text:span><text:span text:style-name="T49">},{</text:span><text:span text:style-name="T48">3</text:span><text:span text:style-name="T49">,</text:span><text:span text:style-name="T48">9</text:span><text:span text:style-name="T49">,</text:span><text:span text:style-name="T48">8</text:span><text:span text:style-name="T49">,</text:span><text:span text:style-name="T48">9</text:span><text:span text:style-name="T49">},{</text:span><text:span text:style-name="T48">5</text:span><text:span text:style-name="T49">,</text:span><text:span text:style-name="T48">7</text:span><text:span text:style-name="T49">,</text:span><text:span text:style-name="T48">12</text:span><text:span text:style-name="T49">,</text:span><text:span text:style-name="T48">7</text:span><text:span text:style-name="T49">}};</text:span></text:p><text:p text:style-name="P22"><text:span text:style-name="T43">2 <text:s/></text:span><text:span text:style-name="T44">for</text:span><text:span text:style-name="T49">(</text:span><text:span text:style-name="T44">int</text:span><text:span text:style-name="T47">[]</text:span><text:span text:style-name="T45"> </text:span><text:span text:style-name="T46">mySimpleArray</text:span><text:span text:style-name="T49">:</text:span><text:span text:style-name="T45"> </text:span><text:span text:style-name="T46">myComplexArray</text:span><text:span text:style-name="T49">)</text:span><text:span text:style-name="T45"> </text:span><text:span text:style-name="T49">{</text:span></text:p><text:p text:style-name="P22"><text:span text:style-name="T43">3 <text:s/></text:span><text:span text:style-name="T45"><text:s text:c="4"/></text:span><text:span text:style-name="T44">for</text:span><text:span text:style-name="T49">(</text:span><text:span text:style-name="T44">int</text:span><text:span text:style-name="T45"> </text:span><text:span text:style-name="T46">i</text:span><text:span text:style-name="T47">=</text:span><text:span text:style-name="T48">0</text:span><text:span text:style-name="T49">;</text:span><text:span text:style-name="T45"> </text:span><text:span text:style-name="T46">i</text:span><text:span text:style-name="T47">&lt;</text:span><text:span text:style-name="T46">mySimpleArray</text:span><text:span text:style-name="T49">.</text:span><text:span text:style-name="T51">length</text:span><text:span text:style-name="T49">;</text:span><text:span text:style-name="T45"> </text:span><text:span text:style-name="T46">i</text:span><text:span text:style-name="T47">++</text:span><text:span text:style-name="T49">)</text:span><text:span text:style-name="T45"> </text:span><text:span text:style-name="T49">{</text:span></text:p><text:p text:style-name="P22"><text:span text:style-name="T43">4 <text:s/></text:span><text:span text:style-name="T45"><text:s text:c="8"/></text:span><text:span text:style-name="T46">System</text:span><text:span text:style-name="T49">.</text:span><text:span text:style-name="T51">out</text:span><text:span text:style-name="T49">.</text:span><text:span text:style-name="T51">print</text:span><text:span text:style-name="T49">(</text:span><text:span text:style-name="T46">mySimpleArray</text:span><text:span text:style-name="T47">[</text:span><text:span text:style-name="T46">i</text:span><text:span text:style-name="T47">]+</text:span><text:span text:style-name="T53">"\t"</text:span><text:span text:style-name="T49">);</text:span></text:p><text:p text:style-name="P22"><text:span text:style-name="T43">5 <text:s/></text:span><text:span text:style-name="T45"><text:s text:c="4"/></text:span><text:span text:style-name="T49">}</text:span></text:p><text:p text:style-name="P22"><text:span text:style-name="T43">6 <text:s/></text:span><text:span text:style-name="T45"><text:s text:c="4"/></text:span><text:span text:style-name="T46">System</text:span><text:span text:style-name="T49">.</text:span><text:span text:style-name="T51">out</text:span><text:span text:style-name="T49">.</text:span><text:span text:style-name="T51">println</text:span><text:span text:style-name="T49">();</text:span></text:p><text:p text:style-name="P22"><text:span text:style-name="T43">7 <text:s/></text:span><text:span text:style-name="T49">}</text:span></text:p></draw:text-box></draw:frame><text:span text:style-name="T5"/></text:p>
      <text:p text:style-name="P3"><text:span text:style-name="T5">obteniendo el siguiente resultado:</text:span></text:p>
      <text:p text:style-name="P3"><text:span text:style-name="T5"/></text:p>
      <text:p text:style-name="P3"><text:span text:style-name="T5">5 2 1 <text:s text:c="2"/>3</text:span></text:p>
      <text:p text:style-name="P3"><text:span text:style-name="T5">3 9 8 <text:s text:c="2"/>9</text:span></text:p>
      <text:p text:style-name="P3"><text:span text:style-name="T5">5 7 12 7</text:span></text:p>
      <text:p text:style-name="P3"><text:span text:style-name="T5"/></text:p>
      <text:p text:style-name="P20"><text:span text:style-name="T28">Etiquetas Opcionales</text:span><text:span text:style-name="T5">: </text:span><text:span text:style-name="T12">Una cosa que intencionalmente omitimos cuando presentamos las sentencias </text:span><text:span text:style-name="T24">if</text:span><text:span text:style-name="T12">, </text:span><text:span text:style-name="T24">switch</text:span><text:span text:style-name="T12"> y los bucles es que todos ellos pueden tener etiquetas opcionales. Una etiqueta es un puntero opcional al inicio de una sentencia que permite que el flujo de la aplicación salte a ella o se rompa desde ella. Es un único identificador seguido de dos puntos (:). Por ejemplo, podemos agregar etiquetas opcionales a uno de los ejemplos anteriores:</text:span></text:p>
      <text:p text:style-name="P3"><text:span text:style-name="T5"/></text:p>
      <text:p text:style-name="P3"><draw:frame text:anchor-type="paragraph" draw:z-index="33" draw:name="Marco de texto 26" draw:style-name="gr1" draw:text-style-name="P24" svg:width="12.415cm" svg:height="4.059cm" svg:x="0.43cm" svg:y="0.155cm"><draw:text-box><text:p text:style-name="P22"><text:span text:style-name="T43"><text:s/></text:span><text:span text:style-name="T43">1 <text:s/></text:span><text:span text:style-name="T44">int</text:span><text:span text:style-name="T47">[][]</text:span><text:span text:style-name="T45"> </text:span><text:span text:style-name="T46">myComplexArray</text:span><text:span text:style-name="T45"> </text:span><text:span text:style-name="T47">=</text:span><text:span text:style-name="T45"> </text:span><text:span text:style-name="T49">{{</text:span><text:span text:style-name="T48">5</text:span><text:span text:style-name="T49">,</text:span><text:span text:style-name="T48">2</text:span><text:span text:style-name="T49">,</text:span><text:span text:style-name="T48">1</text:span><text:span text:style-name="T49">,</text:span><text:span text:style-name="T48">3</text:span><text:span text:style-name="T49">},{</text:span><text:span text:style-name="T48">3</text:span><text:span text:style-name="T49">,</text:span><text:span text:style-name="T48">9</text:span><text:span text:style-name="T49">,</text:span><text:span text:style-name="T48">8</text:span><text:span text:style-name="T49">,</text:span><text:span text:style-name="T48">9</text:span><text:span text:style-name="T49">},{</text:span><text:span text:style-name="T48">5</text:span><text:span text:style-name="T49">,</text:span><text:span text:style-name="T48">7</text:span><text:span text:style-name="T49">,</text:span><text:span text:style-name="T48">12</text:span><text:span text:style-name="T49">,</text:span><text:span text:style-name="T48">7</text:span><text:span text:style-name="T49">}};</text:span></text:p><text:p text:style-name="P23"><text:span text:style-name="T43"><text:s/></text:span><text:span text:style-name="T43">2 <text:s/></text:span></text:p><text:p text:style-name="P22"><text:span text:style-name="T43"><text:s/></text:span><text:span text:style-name="T43">3 <text:s/></text:span><text:span text:style-name="T50">OUTER_LOOP</text:span><text:span text:style-name="T49">:</text:span><text:span text:style-name="T45"> </text:span><text:span text:style-name="T44">for</text:span><text:span text:style-name="T49">(</text:span><text:span text:style-name="T44">int</text:span><text:span text:style-name="T47">[]</text:span><text:span text:style-name="T45"> </text:span><text:span text:style-name="T46">mySimpleArray</text:span><text:span text:style-name="T45"> </text:span><text:span text:style-name="T49">:</text:span><text:span text:style-name="T45"> </text:span><text:span text:style-name="T46">myComplexArray</text:span><text:span text:style-name="T49">)</text:span><text:span text:style-name="T45"> </text:span><text:span text:style-name="T49">{</text:span></text:p><text:p text:style-name="P23"><text:span text:style-name="T43"><text:s/></text:span><text:span text:style-name="T43">4 <text:s/></text:span></text:p><text:p text:style-name="P22"><text:span text:style-name="T43"><text:s/></text:span><text:span text:style-name="T43">5 <text:s/></text:span><text:span text:style-name="T45"><text:s text:c="4"/></text:span><text:span text:style-name="T50">INNER_LOOP</text:span><text:span text:style-name="T49">:</text:span><text:span text:style-name="T45"> </text:span><text:span text:style-name="T44">for</text:span><text:span text:style-name="T49">(</text:span><text:span text:style-name="T44">int</text:span><text:span text:style-name="T45"> </text:span><text:span text:style-name="T46">i</text:span><text:span text:style-name="T47">=</text:span><text:span text:style-name="T48">0</text:span><text:span text:style-name="T49">;</text:span><text:span text:style-name="T45"> </text:span><text:span text:style-name="T46">i</text:span><text:span text:style-name="T47">&lt;</text:span><text:span text:style-name="T46">mySimpleArray</text:span><text:span text:style-name="T49">.</text:span><text:span text:style-name="T51">length</text:span><text:span text:style-name="T49">;</text:span><text:span text:style-name="T45"> </text:span><text:span text:style-name="T46">i</text:span><text:span text:style-name="T47">++</text:span><text:span text:style-name="T49">)</text:span><text:span text:style-name="T45"> </text:span><text:span text:style-name="T49">{</text:span></text:p><text:p text:style-name="P22"><text:span text:style-name="T43"><text:s/></text:span><text:span text:style-name="T43">6 <text:s/></text:span><text:span text:style-name="T45"><text:s text:c="8"/></text:span><text:span text:style-name="T46">System</text:span><text:span text:style-name="T49">.</text:span><text:span text:style-name="T51">out</text:span><text:span text:style-name="T49">.</text:span><text:span text:style-name="T51">print</text:span><text:span text:style-name="T49">(</text:span><text:span text:style-name="T46">mySimpleArray</text:span><text:span text:style-name="T47">[</text:span><text:span text:style-name="T46">i</text:span><text:span text:style-name="T47">]+</text:span><text:span text:style-name="T53">"\t"</text:span><text:span text:style-name="T49">);</text:span></text:p><text:p text:style-name="P22"><text:span text:style-name="T43"><text:s/></text:span><text:span text:style-name="T43">7 <text:s/></text:span><text:span text:style-name="T45"><text:s text:c="4"/></text:span><text:span text:style-name="T49">}</text:span></text:p><text:p text:style-name="P23"><text:span text:style-name="T43"><text:s/></text:span><text:span text:style-name="T43">8 <text:s/></text:span></text:p><text:p text:style-name="P22"><text:span text:style-name="T43"><text:s/></text:span><text:span text:style-name="T43">9 <text:s/></text:span><text:span text:style-name="T45"><text:s text:c="4"/></text:span><text:span text:style-name="T46">System</text:span><text:span text:style-name="T49">.</text:span><text:span text:style-name="T51">out</text:span><text:span text:style-name="T49">.</text:span><text:span text:style-name="T51">println</text:span><text:span text:style-name="T49">();</text:span></text:p><text:p text:style-name="P22"><text:span text:style-name="T43">10 <text:s/></text:span><text:span text:style-name="T49">}</text:span></text:p></draw:text-box></draw:frame><text:span text:style-name="T5"/></text:p>
      <text:p text:style-name="P3"><text:span text:style-name="T5">Las etiquetas siguen las mismas reglas de formato que los identificadores. Para una mejor legibilidad, comúnmente se expresan en mayúsculas con </text:span><text:span text:style-name="T15">snake_case</text:span><text:span text:style-name="T5">, utilizando guiones bajos entre palabras. Cuando se trabaja con un solo bucle, las etiquetas no añaden ningún valor, pero como verás en la siguiente sección, son extremadamente útiles en estructuras anidadas.</text:span></text:p>
      <text:p text:style-name="P3"><text:span text:style-name="T5"/></text:p>
      <text:p text:style-name="P3"><text:span text:style-name="T30">Sentencia </text:span><text:span text:style-name="T34">break</text:span><text:span text:style-name="T5">: Como viste al trabajar con sentencias </text:span><text:span text:style-name="T20">switch</text:span><text:span text:style-name="T5">, una sentencia </text:span><text:span text:style-name="T20">break</text:span><text:span text:style-name="T5"> transfiere el flujo de control hacia fuera de la sentencia que lo encierra. Lo mismo ocurre con una sentencia </text:span><text:span text:style-name="T20">break</text:span><text:span text:style-name="T5"> que aparece dentro de un bucle </text:span><text:span text:style-name="T20">while</text:span><text:span text:style-name="T5">, </text:span><text:span text:style-name="T20">do/while</text:span><text:span text:style-name="T5"> o </text:span><text:span text:style-name="T20">for</text:span><text:span text:style-name="T5">, ya que terminará el bucle antes de tiempo </text:span></text:p>
      <text:p text:style-name="P3"><draw:frame draw:style-name="fr2" draw:name="Imagen9" text:anchor-type="char" svg:width="7.964cm" svg:height="4.329cm" draw:z-index="34"><draw:image xlink:href="Pictures/10000000000002D300000189D95F240A.jpg" xlink:type="simple" xlink:show="embed" xlink:actuate="onLoad" draw:mime-type="image/jpeg"/></draw:frame><text:span text:style-name="T5"/></text:p>
      <text:p text:style-name="P3"><text:span text:style-name="T5">El parámetro de etiqueta opcional nos permite salir de un bucle externo de nivel superior. En el siguiente ejemplo, buscamos la primera posición de índice (x, y) de un número dentro de un arreglo bidimensional no ordenado</text:span></text:p>
      <text:p text:style-name="P3"><text:span text:style-name="T5"/></text:p>
      <text:p text:style-name="P3"><draw:frame text:anchor-type="paragraph" draw:z-index="35" draw:name="Marco de texto 27" draw:style-name="gr1" draw:text-style-name="P24" svg:width="12.415cm" svg:height="10.956cm" svg:x="0.43cm" svg:y="0.155cm"><draw:text-box><text:p text:style-name="P22"><text:span text:style-name="T43"><text:s/></text:span><text:span text:style-name="T43">1 <text:s/></text:span><text:span text:style-name="T44">public</text:span><text:span text:style-name="T45"> </text:span><text:span text:style-name="T44">class</text:span><text:span text:style-name="T46"> FindInMatrix</text:span><text:span text:style-name="T45"> </text:span><text:span text:style-name="T49">{</text:span></text:p><text:p text:style-name="P22"><text:span text:style-name="T43"><text:s/></text:span><text:span text:style-name="T43">2 <text:s/></text:span><text:span text:style-name="T45"><text:s text:c="4"/></text:span><text:span text:style-name="T44">public</text:span><text:span text:style-name="T45"> </text:span><text:span text:style-name="T44">static</text:span><text:span text:style-name="T45"> </text:span><text:span text:style-name="T44">void</text:span><text:span text:style-name="T45"> </text:span><text:span text:style-name="T46">main</text:span><text:span text:style-name="T49">(</text:span><text:span text:style-name="T46">String</text:span><text:span text:style-name="T47">[]</text:span><text:span text:style-name="T45"> </text:span><text:span text:style-name="T46">args</text:span><text:span text:style-name="T49">)</text:span><text:span text:style-name="T45"> </text:span><text:span text:style-name="T49">{</text:span></text:p><text:p text:style-name="P22"><text:span text:style-name="T43"><text:s/></text:span><text:span text:style-name="T43">3 <text:s/></text:span><text:span text:style-name="T45"><text:s text:c="8"/></text:span><text:span text:style-name="T44">int</text:span><text:span text:style-name="T47">[][]</text:span><text:span text:style-name="T45"> </text:span><text:span text:style-name="T46">list</text:span><text:span text:style-name="T45"> </text:span><text:span text:style-name="T47">=</text:span><text:span text:style-name="T45"> </text:span><text:span text:style-name="T49">{{</text:span><text:span text:style-name="T48">1</text:span><text:span text:style-name="T49">,</text:span><text:span text:style-name="T45"> </text:span><text:span text:style-name="T48">13</text:span><text:span text:style-name="T49">},</text:span><text:span text:style-name="T45"> </text:span><text:span text:style-name="T49">{</text:span><text:span text:style-name="T48">5</text:span><text:span text:style-name="T49">,</text:span><text:span text:style-name="T45"> </text:span><text:span text:style-name="T48">2</text:span><text:span text:style-name="T49">},</text:span><text:span text:style-name="T45"> </text:span><text:span text:style-name="T49">{</text:span><text:span text:style-name="T48">2</text:span><text:span text:style-name="T49">,</text:span><text:span text:style-name="T45"> </text:span><text:span text:style-name="T48">2</text:span><text:span text:style-name="T49">}};</text:span></text:p><text:p text:style-name="P23"><text:span text:style-name="T43"><text:s/></text:span><text:span text:style-name="T43">4 <text:s/></text:span></text:p><text:p text:style-name="P22"><text:span text:style-name="T43"><text:s/></text:span><text:span text:style-name="T43">5 <text:s/></text:span><text:span text:style-name="T45"><text:s text:c="8"/></text:span><text:span text:style-name="T44">int</text:span><text:span text:style-name="T45"> </text:span><text:span text:style-name="T46">searchValue</text:span><text:span text:style-name="T45"> </text:span><text:span text:style-name="T47">=</text:span><text:span text:style-name="T45"> </text:span><text:span text:style-name="T48">2</text:span><text:span text:style-name="T49">;</text:span></text:p><text:p text:style-name="P22"><text:span text:style-name="T43"><text:s/></text:span><text:span text:style-name="T43">6 <text:s/></text:span><text:span text:style-name="T45"><text:s text:c="8"/></text:span><text:span text:style-name="T44">int</text:span><text:span text:style-name="T45"> </text:span><text:span text:style-name="T46">positionX</text:span><text:span text:style-name="T45"> </text:span><text:span text:style-name="T47">=</text:span><text:span text:style-name="T45"> </text:span><text:span text:style-name="T47">-</text:span><text:span text:style-name="T48">1</text:span><text:span text:style-name="T49">;</text:span></text:p><text:p text:style-name="P22"><text:span text:style-name="T43"><text:s/></text:span><text:span text:style-name="T43">7 <text:s/></text:span><text:span text:style-name="T45"><text:s text:c="8"/></text:span><text:span text:style-name="T44">int</text:span><text:span text:style-name="T45"> </text:span><text:span text:style-name="T46">positionY</text:span><text:span text:style-name="T45"> </text:span><text:span text:style-name="T47">=</text:span><text:span text:style-name="T45"> </text:span><text:span text:style-name="T47">-</text:span><text:span text:style-name="T48">1</text:span><text:span text:style-name="T49">;</text:span></text:p><text:p text:style-name="P23"><text:span text:style-name="T43"><text:s/></text:span><text:span text:style-name="T43">8 <text:s/></text:span></text:p><text:p text:style-name="P22"><text:span text:style-name="T43"><text:s/></text:span><text:span text:style-name="T43">9 <text:s/></text:span><text:span text:style-name="T45"><text:s text:c="8"/></text:span><text:span text:style-name="T50">PARENT_LOOP</text:span><text:span text:style-name="T49">:</text:span><text:span text:style-name="T45"> </text:span><text:span text:style-name="T44">for</text:span><text:span text:style-name="T45"> </text:span><text:span text:style-name="T49">(</text:span><text:span text:style-name="T44">int</text:span><text:span text:style-name="T45"> </text:span><text:span text:style-name="T46">i</text:span><text:span text:style-name="T45"> </text:span><text:span text:style-name="T47">=</text:span><text:span text:style-name="T45"> </text:span><text:span text:style-name="T48">0</text:span><text:span text:style-name="T49">;</text:span><text:span text:style-name="T45"> </text:span><text:span text:style-name="T46">i</text:span><text:span text:style-name="T45"> </text:span><text:span text:style-name="T47">&lt;</text:span><text:span text:style-name="T45"> </text:span><text:span text:style-name="T46">list</text:span><text:span text:style-name="T49">.</text:span><text:span text:style-name="T51">length</text:span><text:span text:style-name="T49">;</text:span><text:span text:style-name="T45"> </text:span><text:span text:style-name="T46">i</text:span><text:span text:style-name="T47">++</text:span><text:span text:style-name="T49">)</text:span><text:span text:style-name="T45"> </text:span><text:span text:style-name="T49">{</text:span></text:p><text:p text:style-name="P22"><text:span text:style-name="T43">10 <text:s/></text:span><text:span text:style-name="T45"><text:s text:c="12"/></text:span><text:span text:style-name="T44">for</text:span><text:span text:style-name="T45"> </text:span><text:span text:style-name="T49">(</text:span><text:span text:style-name="T44">int</text:span><text:span text:style-name="T45"> </text:span><text:span text:style-name="T46">j</text:span><text:span text:style-name="T45"> </text:span><text:span text:style-name="T47">=</text:span><text:span text:style-name="T45"> </text:span><text:span text:style-name="T48">0</text:span><text:span text:style-name="T49">;</text:span><text:span text:style-name="T45"> </text:span><text:span text:style-name="T46">j</text:span><text:span text:style-name="T45"> </text:span><text:span text:style-name="T47">&lt;</text:span><text:span text:style-name="T45"> </text:span><text:span text:style-name="T46">list</text:span><text:span text:style-name="T47">[</text:span><text:span text:style-name="T46">i</text:span><text:span text:style-name="T47">]</text:span><text:span text:style-name="T49">.</text:span><text:span text:style-name="T51">length</text:span><text:span text:style-name="T49">;</text:span><text:span text:style-name="T45"> </text:span><text:span text:style-name="T46">j</text:span><text:span text:style-name="T47">++</text:span><text:span text:style-name="T49">)</text:span><text:span text:style-name="T45"> </text:span><text:span text:style-name="T49">{</text:span></text:p><text:p text:style-name="P22"><text:span text:style-name="T43">11 <text:s/></text:span><text:span text:style-name="T45"><text:s text:c="16"/></text:span><text:span text:style-name="T44">if</text:span><text:span text:style-name="T45"> </text:span><text:span text:style-name="T49">(</text:span><text:span text:style-name="T46">list</text:span><text:span text:style-name="T47">[</text:span><text:span text:style-name="T46">i</text:span><text:span text:style-name="T47">][</text:span><text:span text:style-name="T46">j</text:span><text:span text:style-name="T47">]</text:span><text:span text:style-name="T45"> </text:span><text:span text:style-name="T47">==</text:span><text:span text:style-name="T45"> </text:span><text:span text:style-name="T46">searchValue</text:span><text:span text:style-name="T49">)</text:span><text:span text:style-name="T45"> </text:span><text:span text:style-name="T49">{</text:span></text:p><text:p text:style-name="P22"><text:span text:style-name="T43">12 <text:s/></text:span><text:span text:style-name="T45"><text:s text:c="20"/></text:span><text:span text:style-name="T46">positionX</text:span><text:span text:style-name="T45"> </text:span><text:span text:style-name="T47">=</text:span><text:span text:style-name="T45"> </text:span><text:span text:style-name="T46">i</text:span><text:span text:style-name="T49">;</text:span></text:p><text:p text:style-name="P22"><text:span text:style-name="T43">13 <text:s/></text:span><text:span text:style-name="T45"><text:s text:c="20"/></text:span><text:span text:style-name="T46">positionY</text:span><text:span text:style-name="T45"> </text:span><text:span text:style-name="T47">=</text:span><text:span text:style-name="T45"> </text:span><text:span text:style-name="T46">j</text:span><text:span text:style-name="T49">;</text:span></text:p><text:p text:style-name="P22"><text:span text:style-name="T43">14 <text:s/></text:span><text:span text:style-name="T45"><text:s text:c="20"/></text:span><text:span text:style-name="T44">break</text:span><text:span text:style-name="T45"> </text:span><text:span text:style-name="T46">PARENT_LOOP</text:span><text:span text:style-name="T49">;</text:span><text:span text:style-name="T45"> </text:span><text:span text:style-name="T52">// esta sentencia rompe tanto el bucle interno como el externo, terminando la búsqueda.</text:span></text:p><text:p text:style-name="P22"><text:span text:style-name="T43">15 <text:s/></text:span><text:span text:style-name="T45"><text:s text:c="16"/></text:span><text:span text:style-name="T49">}</text:span></text:p><text:p text:style-name="P22"><text:span text:style-name="T43">16 <text:s/></text:span><text:span text:style-name="T45"><text:s text:c="12"/></text:span><text:span text:style-name="T49">}</text:span></text:p><text:p text:style-name="P22"><text:span text:style-name="T43">17 <text:s/></text:span><text:span text:style-name="T45"><text:s text:c="8"/></text:span><text:span text:style-name="T49">}</text:span></text:p><text:p text:style-name="P23"><text:span text:style-name="T43">18 <text:s/></text:span></text:p><text:p text:style-name="P22"><text:span text:style-name="T43">19 <text:s/></text:span><text:span text:style-name="T45"><text:s text:c="8"/></text:span><text:span text:style-name="T44">if</text:span><text:span text:style-name="T45"> </text:span><text:span text:style-name="T49">(</text:span><text:span text:style-name="T46">positionX</text:span><text:span text:style-name="T45"> </text:span><text:span text:style-name="T47">==</text:span><text:span text:style-name="T45"> </text:span><text:span text:style-name="T47">-</text:span><text:span text:style-name="T48">1</text:span><text:span text:style-name="T45"> </text:span><text:span text:style-name="T47">||</text:span><text:span text:style-name="T45"> </text:span><text:span text:style-name="T46">positionY</text:span><text:span text:style-name="T45"> </text:span><text:span text:style-name="T47">==</text:span><text:span text:style-name="T45"> </text:span><text:span text:style-name="T47">-</text:span><text:span text:style-name="T48">1</text:span><text:span text:style-name="T49">)</text:span><text:span text:style-name="T45"> </text:span><text:span text:style-name="T49">{</text:span></text:p><text:p text:style-name="P22"><text:span text:style-name="T43">20 <text:s/></text:span><text:span text:style-name="T45"><text:s text:c="12"/></text:span><text:span text:style-name="T46">System</text:span><text:span text:style-name="T49">.</text:span><text:span text:style-name="T51">out</text:span><text:span text:style-name="T49">.</text:span><text:span text:style-name="T51">println</text:span><text:span text:style-name="T49">(</text:span><text:span text:style-name="T53">"Value "</text:span><text:span text:style-name="T45"> </text:span><text:span text:style-name="T47">+</text:span><text:span text:style-name="T45"> </text:span><text:span text:style-name="T46">searchValue</text:span><text:span text:style-name="T45"> </text:span><text:span text:style-name="T47">+</text:span><text:span text:style-name="T45"> </text:span><text:span text:style-name="T53">" not found"</text:span><text:span text:style-name="T49">);</text:span></text:p><text:p text:style-name="P22"><text:span text:style-name="T43">21 <text:s/></text:span><text:span text:style-name="T45"><text:s text:c="8"/></text:span><text:span text:style-name="T49">}</text:span><text:span text:style-name="T45"> </text:span><text:span text:style-name="T44">else</text:span><text:span text:style-name="T45"> </text:span><text:span text:style-name="T49">{</text:span></text:p><text:p text:style-name="P22"><text:span text:style-name="T43">22 <text:s/></text:span><text:span text:style-name="T45"><text:s text:c="12"/></text:span><text:span text:style-name="T46">System</text:span><text:span text:style-name="T49">.</text:span><text:span text:style-name="T51">out</text:span><text:span text:style-name="T49">.</text:span><text:span text:style-name="T51">println</text:span><text:span text:style-name="T49">(</text:span><text:span text:style-name="T53">"Value "</text:span><text:span text:style-name="T45"> </text:span><text:span text:style-name="T47">+</text:span><text:span text:style-name="T45"> </text:span><text:span text:style-name="T46">searchValue</text:span><text:span text:style-name="T45"> </text:span><text:span text:style-name="T47">+</text:span><text:span text:style-name="T45"> </text:span><text:span text:style-name="T53">" found at: ("</text:span><text:span text:style-name="T45"> </text:span><text:span text:style-name="T47">+</text:span><text:span text:style-name="T45"> </text:span><text:span text:style-name="T46">positionX</text:span><text:span text:style-name="T45"> </text:span><text:span text:style-name="T47">+</text:span><text:span text:style-name="T45"> </text:span><text:span text:style-name="T53">","</text:span><text:span text:style-name="T45"> </text:span><text:span text:style-name="T47">+</text:span><text:span text:style-name="T45"> </text:span><text:span text:style-name="T46">positionY</text:span><text:span text:style-name="T45"> </text:span><text:span text:style-name="T47">+</text:span><text:span text:style-name="T45"> </text:span><text:span text:style-name="T53">")"</text:span><text:span text:style-name="T49">);</text:span></text:p><text:p text:style-name="P22"><text:span text:style-name="T43">23 <text:s/></text:span><text:span text:style-name="T45"><text:s text:c="8"/></text:span><text:span text:style-name="T49">}</text:span></text:p><text:p text:style-name="P22"><text:span text:style-name="T43">24 <text:s/></text:span><text:span text:style-name="T45"><text:s text:c="4"/></text:span><text:span text:style-name="T49">}</text:span></text:p><text:p text:style-name="P22"><text:span text:style-name="T43">25 <text:s/></text:span><text:span text:style-name="T49">}</text:span></text:p></draw:text-box></draw:frame><text:span text:style-name="T5"/></text:p>
      <text:p text:style-name="P3"><text:span text:style-name="T5"/></text:p>
      <text:p text:style-name="P3"><text:soft-page-break/><text:span text:style-name="T5">si remplazamos el bucle interno por lo siguiente:</text:span></text:p>
      <text:p text:style-name="P3"><text:span text:style-name="T5"/></text:p>
      <text:p text:style-name="P3"><draw:frame text:anchor-type="paragraph" draw:z-index="36" draw:name="Marco de texto 28" draw:style-name="gr1" draw:text-style-name="P24" svg:width="12.415cm" svg:height="2.031cm" svg:x="0.43cm" svg:y="0.155cm"><draw:text-box><text:p text:style-name="P22"><text:span text:style-name="T43">1 <text:s/></text:span><text:span text:style-name="T44">if</text:span><text:span text:style-name="T45"> </text:span><text:span text:style-name="T49">(</text:span><text:span text:style-name="T46">list</text:span><text:span text:style-name="T47">[</text:span><text:span text:style-name="T46">i</text:span><text:span text:style-name="T47">][</text:span><text:span text:style-name="T46">j</text:span><text:span text:style-name="T47">]</text:span><text:span text:style-name="T45"> </text:span><text:span text:style-name="T47">==</text:span><text:span text:style-name="T45"> </text:span><text:span text:style-name="T46">searchValue</text:span><text:span text:style-name="T49">)</text:span><text:span text:style-name="T45"> </text:span><text:span text:style-name="T49">{</text:span></text:p><text:p text:style-name="P22"><text:span text:style-name="T43">2 <text:s/></text:span><text:span text:style-name="T45"><text:s text:c="4"/></text:span><text:span text:style-name="T46">positionX</text:span><text:span text:style-name="T45"> </text:span><text:span text:style-name="T47">=</text:span><text:span text:style-name="T45"> </text:span><text:span text:style-name="T46">i</text:span><text:span text:style-name="T49">;</text:span></text:p><text:p text:style-name="P22"><text:span text:style-name="T43">3 <text:s/></text:span><text:span text:style-name="T45"><text:s text:c="4"/></text:span><text:span text:style-name="T46">positionY</text:span><text:span text:style-name="T45"> </text:span><text:span text:style-name="T47">=</text:span><text:span text:style-name="T45"> </text:span><text:span text:style-name="T46">j</text:span><text:span text:style-name="T49">;</text:span></text:p><text:p text:style-name="P22"><text:span text:style-name="T43">4 <text:s/></text:span><text:span text:style-name="T45"><text:s text:c="4"/></text:span><text:span text:style-name="T44">break</text:span><text:span text:style-name="T49">;</text:span></text:p><text:p text:style-name="P22"><text:span text:style-name="T43">5 <text:s/></text:span><text:span text:style-name="T49">}</text:span></text:p></draw:text-box></draw:frame><text:span text:style-name="T5"/></text:p>
      <text:p text:style-name="P3"><text:span text:style-name="T5">El programa solo saldría del bucle interno actual, y continuaría buscando en las siguientes filas del arreglo, incluso si ya encontró el valor.</text:span></text:p>
      <text:p text:style-name="P3"><text:span text:style-name="T5"/></text:p>
      <text:p text:style-name="P3"><text:span text:style-name="T5">obtenemos: </text:span><text:span text:style-name="T20">Value 2 found at: (2, 0)</text:span></text:p>
      <text:p text:style-name="P3"><text:span text:style-name="T5"/></text:p>
      <text:p text:style-name="P3"><text:span text:style-name="T5">y si removemos la sentencia </text:span><text:span text:style-name="T25">break</text:span></text:p>
      <text:p text:style-name="P3"><text:span text:style-name="T5"/></text:p>
      <text:p text:style-name="P3"><draw:frame text:anchor-type="paragraph" draw:z-index="37" draw:name="Marco de texto 29" draw:style-name="gr1" draw:text-style-name="P24" svg:width="12.415cm" svg:height="1.625cm" svg:x="0.43cm" svg:y="0.155cm"><draw:text-box><text:p text:style-name="P22"><text:span text:style-name="T43">1 <text:s/></text:span><text:span text:style-name="T44">if</text:span><text:span text:style-name="T45"> </text:span><text:span text:style-name="T49">(</text:span><text:span text:style-name="T46">list</text:span><text:span text:style-name="T47">[</text:span><text:span text:style-name="T46">i</text:span><text:span text:style-name="T47">][</text:span><text:span text:style-name="T46">j</text:span><text:span text:style-name="T47">]</text:span><text:span text:style-name="T45"> </text:span><text:span text:style-name="T47">==</text:span><text:span text:style-name="T45"> </text:span><text:span text:style-name="T46">searchValue</text:span><text:span text:style-name="T49">)</text:span><text:span text:style-name="T45"> </text:span><text:span text:style-name="T49">{</text:span></text:p><text:p text:style-name="P22"><text:span text:style-name="T43">2 <text:s/></text:span><text:span text:style-name="T45"><text:s text:c="4"/></text:span><text:span text:style-name="T46">positionX</text:span><text:span text:style-name="T45"> </text:span><text:span text:style-name="T47">=</text:span><text:span text:style-name="T45"> </text:span><text:span text:style-name="T46">i</text:span><text:span text:style-name="T49">;</text:span></text:p><text:p text:style-name="P22"><text:span text:style-name="T43">3 <text:s/></text:span><text:span text:style-name="T45"><text:s text:c="4"/></text:span><text:span text:style-name="T46">positionY</text:span><text:span text:style-name="T45"> </text:span><text:span text:style-name="T47">=</text:span><text:span text:style-name="T45"> </text:span><text:span text:style-name="T46">j</text:span><text:span text:style-name="T49">;</text:span></text:p><text:p text:style-name="P22"><text:span text:style-name="T43">4 <text:s/></text:span><text:span text:style-name="T49">}</text:span></text:p></draw:text-box></draw:frame><text:span text:style-name="T5"/></text:p>
      <text:p text:style-name="P3"><text:span text:style-name="T5">obtenemos: </text:span><text:span text:style-name="T20">Value 2 found at: (2, 1)</text:span></text:p>
      <text:p text:style-name="P3"><text:span text:style-name="T5"/></text:p>
      <text:p text:style-name="P3"><text:span text:style-name="T39">sentencia </text:span><text:span text:style-name="T37">continue</text:span><text:span text:style-name="T5">: La sentencia </text:span><text:span text:style-name="T20">continue</text:span><text:span text:style-name="T5"> te permite controlar el flujo de ejecución dentro de un bucle, permitiendo saltar a la siguiente iteración sin ejecutar el resto del código de la iteración actual. Esto es útil cuando quieres omitir ciertas partes del bucle en función de determinadas condiciones</text:span></text:p>
      <text:p text:style-name="P3"><text:span text:style-name="T5"/></text:p>
      <text:p text:style-name="P3"><draw:frame text:anchor-type="paragraph" draw:z-index="38" draw:name="Marco de texto 30" draw:style-name="gr1" draw:text-style-name="P24" svg:width="12.415cm" svg:height="2.437cm" svg:x="0.43cm" svg:y="0.155cm"><draw:text-box><text:p text:style-name="P22"><text:span text:style-name="T43">1 <text:s/></text:span><text:span text:style-name="T44">for</text:span><text:span text:style-name="T45"> </text:span><text:span text:style-name="T49">(</text:span><text:span text:style-name="T44">int</text:span><text:span text:style-name="T45"> </text:span><text:span text:style-name="T46">i</text:span><text:span text:style-name="T45"> </text:span><text:span text:style-name="T47">=</text:span><text:span text:style-name="T45"> </text:span><text:span text:style-name="T48">0</text:span><text:span text:style-name="T49">;</text:span><text:span text:style-name="T45"> </text:span><text:span text:style-name="T46">i</text:span><text:span text:style-name="T45"> </text:span><text:span text:style-name="T47">&lt;</text:span><text:span text:style-name="T45"> </text:span><text:span text:style-name="T48">10</text:span><text:span text:style-name="T49">;</text:span><text:span text:style-name="T45"> </text:span><text:span text:style-name="T46">i</text:span><text:span text:style-name="T47">++</text:span><text:span text:style-name="T49">)</text:span><text:span text:style-name="T45"> </text:span><text:span text:style-name="T49">{</text:span></text:p><text:p text:style-name="P22"><text:span text:style-name="T43">2 <text:s/></text:span><text:span text:style-name="T45"><text:s text:c="4"/></text:span><text:span text:style-name="T44">if</text:span><text:span text:style-name="T45"> </text:span><text:span text:style-name="T49">(</text:span><text:span text:style-name="T46">i</text:span><text:span text:style-name="T45"> </text:span><text:span text:style-name="T47">%</text:span><text:span text:style-name="T45"> </text:span><text:span text:style-name="T48">2</text:span><text:span text:style-name="T45"> </text:span><text:span text:style-name="T47">==</text:span><text:span text:style-name="T45"> </text:span><text:span text:style-name="T48">0</text:span><text:span text:style-name="T49">)</text:span><text:span text:style-name="T45"> </text:span><text:span text:style-name="T49">{</text:span></text:p><text:p text:style-name="P22"><text:span text:style-name="T43">3 <text:s/></text:span><text:span text:style-name="T45"><text:s text:c="8"/></text:span><text:span text:style-name="T44">continue</text:span><text:span text:style-name="T49">;</text:span><text:span text:style-name="T45"> </text:span><text:span text:style-name="T52">// Salta a la siguiente iteración si i es par</text:span></text:p><text:p text:style-name="P22"><text:span text:style-name="T43">4 <text:s/></text:span><text:span text:style-name="T45"><text:s text:c="4"/></text:span><text:span text:style-name="T49">}</text:span></text:p><text:p text:style-name="P22"><text:span text:style-name="T43">5 <text:s/></text:span><text:span text:style-name="T45"><text:s text:c="4"/></text:span><text:span text:style-name="T46">System</text:span><text:span text:style-name="T49">.</text:span><text:span text:style-name="T51">out</text:span><text:span text:style-name="T49">.</text:span><text:span text:style-name="T51">println</text:span><text:span text:style-name="T49">(</text:span><text:span text:style-name="T46">i</text:span><text:span text:style-name="T49">);</text:span></text:p><text:p text:style-name="P22"><text:span text:style-name="T43">6 <text:s/></text:span><text:span text:style-name="T49">}</text:span></text:p></draw:text-box></draw:frame><text:span text:style-name="T5"/></text:p>
      <text:p text:style-name="P3"><text:span text:style-name="T5">Este código imprimirá solo los números impares del 0 al 9, ya que cuando </text:span><text:span text:style-name="T20">i</text:span><text:span text:style-name="T5"> es par, la sentencia </text:span><text:span text:style-name="T20">continue</text:span><text:span text:style-name="T5"> salta a la siguiente iteración.</text:span></text:p>
      <text:p text:style-name="P3"><text:span text:style-name="T5"/></text:p>
      <text:p text:style-name="P3"><text:span text:style-name="T5">La sentencia </text:span><text:span text:style-name="T20">continue</text:span><text:span text:style-name="T5"> se aplica al bucle interno más cercano que está en ejecución. Sin embargo, podemos usar etiquetas opcionales para anular este comportamiento.</text:span></text:p>
      <text:p text:style-name="P3"><text:span text:style-name="T5"/></text:p>
      <text:p text:style-name="P3"><text:span text:style-name="T5"/></text:p>
      <text:p text:style-name="P3"><text:span text:style-name="T5"/></text:p>
      <text:p text:style-name="P3"><text:span text:style-name="T5"/></text:p>
      <text:p text:style-name="P3"><draw:frame text:anchor-type="paragraph" draw:z-index="39" draw:name="Marco de texto 31" draw:style-name="gr1" draw:text-style-name="P24" svg:width="12.415cm" svg:height="6.899cm" svg:x="0.43cm" svg:y="0.155cm"><draw:text-box><text:p text:style-name="P22"><text:span text:style-name="T43"><text:s/></text:span><text:span text:style-name="T43">1 <text:s/></text:span><text:span text:style-name="T44">public</text:span><text:span text:style-name="T45"> </text:span><text:span text:style-name="T44">class</text:span><text:span text:style-name="T46"> CleaningSchedule</text:span><text:span text:style-name="T45"> </text:span><text:span text:style-name="T49">{</text:span></text:p><text:p text:style-name="P22"><text:span text:style-name="T43"><text:s/></text:span><text:span text:style-name="T43">2 <text:s/></text:span><text:span text:style-name="T45"><text:s text:c="4"/></text:span><text:span text:style-name="T44">public</text:span><text:span text:style-name="T45"> </text:span><text:span text:style-name="T44">static</text:span><text:span text:style-name="T45"> </text:span><text:span text:style-name="T44">void</text:span><text:span text:style-name="T45"> </text:span><text:span text:style-name="T46">main</text:span><text:span text:style-name="T49">(</text:span><text:span text:style-name="T46">String</text:span><text:span text:style-name="T47">[]</text:span><text:span text:style-name="T45"> </text:span><text:span text:style-name="T46">args</text:span><text:span text:style-name="T49">)</text:span><text:span text:style-name="T45"> </text:span><text:span text:style-name="T49">{</text:span></text:p><text:p text:style-name="P22"><text:span text:style-name="T43"><text:s/></text:span><text:span text:style-name="T43">3 <text:s/></text:span><text:span text:style-name="T45"><text:s text:c="8"/></text:span><text:span text:style-name="T44">for</text:span><text:span text:style-name="T45"> </text:span><text:span text:style-name="T49">(</text:span><text:span text:style-name="T44">char</text:span><text:span text:style-name="T45"> </text:span><text:span text:style-name="T46">stables</text:span><text:span text:style-name="T45"> </text:span><text:span text:style-name="T47">=</text:span><text:span text:style-name="T45"> </text:span><text:span text:style-name="T53">'a'</text:span><text:span text:style-name="T49">;</text:span><text:span text:style-name="T45"> </text:span><text:span text:style-name="T46">stables</text:span><text:span text:style-name="T45"> </text:span><text:span text:style-name="T47">&lt;=</text:span><text:span text:style-name="T45"> </text:span><text:span text:style-name="T53">'d'</text:span><text:span text:style-name="T49">;</text:span><text:span text:style-name="T45"> </text:span><text:span text:style-name="T46">stables</text:span><text:span text:style-name="T47">++</text:span><text:span text:style-name="T49">)</text:span><text:span text:style-name="T45"> </text:span><text:span text:style-name="T49">{</text:span></text:p><text:p text:style-name="P22"><text:span text:style-name="T43"><text:s/></text:span><text:span text:style-name="T43">4 <text:s/></text:span><text:span text:style-name="T45"><text:s text:c="12"/></text:span><text:span text:style-name="T46">CLEANING</text:span><text:span text:style-name="T49">:</text:span><text:span text:style-name="T45"> </text:span><text:span text:style-name="T44">for</text:span><text:span text:style-name="T45"> </text:span><text:span text:style-name="T49">(</text:span><text:span text:style-name="T44">int</text:span><text:span text:style-name="T45"> </text:span><text:span text:style-name="T46">leopard</text:span><text:span text:style-name="T45"> </text:span><text:span text:style-name="T47">=</text:span><text:span text:style-name="T45"> </text:span><text:span text:style-name="T48">1</text:span><text:span text:style-name="T49">;</text:span><text:span text:style-name="T45"> </text:span><text:span text:style-name="T46">leopard</text:span><text:span text:style-name="T45"> </text:span><text:span text:style-name="T47">&lt;=</text:span><text:span text:style-name="T45"> </text:span><text:span text:style-name="T48">2</text:span><text:span text:style-name="T49">;</text:span><text:span text:style-name="T45"> </text:span><text:span text:style-name="T46">leopard</text:span><text:span text:style-name="T47">++</text:span><text:span text:style-name="T49">)</text:span><text:span text:style-name="T45"> </text:span><text:span text:style-name="T49">{</text:span></text:p><text:p text:style-name="P22"><text:span text:style-name="T43"><text:s/></text:span><text:span text:style-name="T43">5 <text:s/></text:span><text:span text:style-name="T45"><text:s text:c="16"/></text:span><text:span text:style-name="T44">if</text:span><text:span text:style-name="T45"> </text:span><text:span text:style-name="T49">(</text:span><text:span text:style-name="T46">stables</text:span><text:span text:style-name="T45"> </text:span><text:span text:style-name="T47">==</text:span><text:span text:style-name="T45"> </text:span><text:span text:style-name="T53">'b'</text:span><text:span text:style-name="T45"> </text:span><text:span text:style-name="T47">||</text:span><text:span text:style-name="T45"> </text:span><text:span text:style-name="T46">leopard</text:span><text:span text:style-name="T45"> </text:span><text:span text:style-name="T47">==</text:span><text:span text:style-name="T45"> </text:span><text:span text:style-name="T48">2</text:span><text:span text:style-name="T49">)</text:span><text:span text:style-name="T45"> </text:span><text:span text:style-name="T49">{</text:span></text:p><text:p text:style-name="P22"><text:span text:style-name="T43"><text:s/></text:span><text:span text:style-name="T43">6 <text:s/></text:span><text:span text:style-name="T45"><text:s text:c="20"/></text:span><text:span text:style-name="T44">continue</text:span><text:span text:style-name="T45"> </text:span><text:span text:style-name="T46">CLEANING</text:span><text:span text:style-name="T49">;</text:span><text:span text:style-name="T45"> </text:span><text:span text:style-name="T52">// Salta al siguiente establo o leopardo</text:span></text:p><text:p text:style-name="P22"><text:span text:style-name="T43"><text:s/></text:span><text:span text:style-name="T43">7 <text:s/></text:span><text:span text:style-name="T45"><text:s text:c="16"/></text:span><text:span text:style-name="T49">}</text:span></text:p><text:p text:style-name="P22"><text:span text:style-name="T43"><text:s/></text:span><text:span text:style-name="T43">8 <text:s/></text:span><text:span text:style-name="T45"><text:s text:c="16"/></text:span><text:span text:style-name="T46">System</text:span><text:span text:style-name="T49">.</text:span><text:span text:style-name="T51">out</text:span><text:span text:style-name="T49">.</text:span><text:span text:style-name="T51">println</text:span><text:span text:style-name="T49">(</text:span><text:span text:style-name="T53">"Cleaning: "</text:span><text:span text:style-name="T45"> </text:span><text:span text:style-name="T47">+</text:span><text:span text:style-name="T45"> </text:span><text:span text:style-name="T46">stables</text:span><text:span text:style-name="T45"> </text:span><text:span text:style-name="T47">+</text:span><text:span text:style-name="T45"> </text:span><text:span text:style-name="T53">","</text:span><text:span text:style-name="T45"> </text:span><text:span text:style-name="T47">+</text:span><text:span text:style-name="T45"> </text:span><text:span text:style-name="T46">leopard</text:span><text:span text:style-name="T49">);</text:span></text:p><text:p text:style-name="P22"><text:span text:style-name="T43"><text:s/></text:span><text:span text:style-name="T43">9 <text:s/></text:span><text:span text:style-name="T45"><text:s text:c="12"/></text:span><text:span text:style-name="T49">}</text:span></text:p><text:p text:style-name="P22"><text:span text:style-name="T43">10 <text:s/></text:span><text:span text:style-name="T45"><text:s text:c="8"/></text:span><text:span text:style-name="T49">}</text:span></text:p><text:p text:style-name="P22"><text:span text:style-name="T43">11 <text:s/></text:span><text:span text:style-name="T45"><text:s text:c="4"/></text:span><text:span text:style-name="T49">}</text:span></text:p><text:p text:style-name="P22"><text:span text:style-name="T43">12 <text:s/></text:span><text:span text:style-name="T49">}</text:span></text:p><text:p text:style-name="P23"><text:span text:style-name="T43">13 <text:s/></text:span></text:p><text:p text:style-name="P22"><text:span text:style-name="T43">14 <text:s/></text:span><text:span text:style-name="T52">// Salida: El programa imprimirá:</text:span></text:p><text:p text:style-name="P22"><text:span text:style-name="T43">15 <text:s/></text:span><text:span text:style-name="T52">// Cleaning: a,1</text:span></text:p><text:p text:style-name="P22"><text:span text:style-name="T43">16 <text:s/></text:span><text:span text:style-name="T52">// Cleaning: c,1</text:span></text:p><text:p text:style-name="P22"><text:span text:style-name="T43">17 <text:s/></text:span><text:span text:style-name="T52">// Cleaning: d,1</text:span></text:p></draw:text-box></draw:frame><text:span text:style-name="T5"/></text:p>
      <text:p text:style-name="P3"><text:span text:style-name="T5">pero si solo dejamos </text:span><text:span text:style-name="T25">continue</text:span><text:span text:style-name="T5"> (eliminamos </text:span><text:span text:style-name="T18">cleaning</text:span><text:span text:style-name="T5">) <text:s/>obtendremos:</text:span></text:p>
      <text:p text:style-name="P3"><text:span text:style-name="T5"/></text:p>
      <text:p text:style-name="P3"><draw:frame text:anchor-type="paragraph" draw:z-index="40" draw:name="Marco de texto 32" draw:style-name="gr1" draw:text-style-name="P24" svg:width="12.415cm" svg:height="2.842cm" svg:x="0.43cm" svg:y="0.155cm"><draw:text-box><text:p text:style-name="P22"><text:span text:style-name="T43">1 <text:s/></text:span><text:span text:style-name="T52">// Salida: El programa imprimirá:</text:span></text:p><text:p text:style-name="P22"><text:span text:style-name="T43">2 <text:s/></text:span><text:span text:style-name="T52">// Cleaning: a,1</text:span></text:p><text:p text:style-name="P22"><text:span text:style-name="T43">3 <text:s/></text:span><text:span text:style-name="T52">// Cleaning: a,3</text:span></text:p><text:p text:style-name="P22"><text:span text:style-name="T43">4 <text:s/></text:span><text:span text:style-name="T52">// Cleaning: c,1</text:span></text:p><text:p text:style-name="P22"><text:span text:style-name="T43">5 <text:s/></text:span><text:span text:style-name="T52">// Cleaning: c,3</text:span></text:p><text:p text:style-name="P22"><text:span text:style-name="T43">6 <text:s/></text:span><text:span text:style-name="T52">// Cleaning: d,1</text:span></text:p><text:p text:style-name="P22"><text:span text:style-name="T43">7 <text:s/></text:span><text:span text:style-name="T52">// Cleaning: d,3</text:span></text:p></draw:text-box></draw:frame><text:span text:style-name="T5"/></text:p>
      <text:p text:style-name="P10"><text:span text:style-name="T5">Y si removemos el </text:span><text:span text:style-name="T25">continue</text:span><text:span text:style-name="T5"> y las sentencias </text:span><text:span text:style-name="T26">if</text:span><text:span text:style-name="T5"> obtendríamos</text:span></text:p>
      <text:p text:style-name="P3"><text:span text:style-name="T5"/></text:p>
      <text:p text:style-name="P3"><draw:frame text:anchor-type="paragraph" draw:z-index="41" draw:name="Marco de texto 33" draw:style-name="gr1" draw:text-style-name="P24" svg:width="12.415cm" svg:height="4.871cm" svg:x="0.43cm" svg:y="0.155cm"><draw:text-box><text:p text:style-name="P22"><text:span text:style-name="T54">// Cleaning: a,1</text:span></text:p><text:p text:style-name="P22"><text:span text:style-name="T54">// Cleaning: a,2</text:span></text:p><text:p text:style-name="P22"><text:span text:style-name="T54">// Cleaning: a,3</text:span></text:p><text:p text:style-name="P22"><text:span text:style-name="T54">// Cleaning: b,1</text:span></text:p><text:p text:style-name="P22"><text:span text:style-name="T54">// Cleaning: b,2</text:span></text:p><text:p text:style-name="P22"><text:span text:style-name="T54">// Cleaning: b,3</text:span></text:p><text:p text:style-name="P22"><text:span text:style-name="T54">// Cleaning: c,1</text:span></text:p><text:p text:style-name="P22"><text:span text:style-name="T54">// Cleaning: c,2</text:span></text:p><text:p text:style-name="P22"><text:span text:style-name="T54">// Cleaning: c,3</text:span></text:p><text:p text:style-name="P22"><text:span text:style-name="T54">// Cleaning: d,1</text:span></text:p><text:p text:style-name="P22"><text:span text:style-name="T54">// Cleaning: d,2</text:span></text:p><text:p text:style-name="P22"><text:span text:style-name="T54">// Cleaning: d,3</text:span></text:p></draw:text-box></draw:frame><text:span text:style-name="T5"/></text:p>
      <text:p text:style-name="P3"><text:span text:style-name="T5"/></text:p>
      <text:p text:style-name="P3"><text:soft-page-break/><text:span text:style-name="T35">S</text:span><text:span text:style-name="T30">entencia </text:span><text:span text:style-name="T38">return</text:span><text:span text:style-name="T5">: en el siguiente ejemplo podremos ver como la sentencia </text:span><text:span text:style-name="T26">return</text:span><text:span text:style-name="T5"> funciona como una mejor alternativa a las etiquetas y </text:span><text:span text:style-name="T20">break</text:span><text:span text:style-name="T5">.</text:span></text:p>
      <text:p text:style-name="P3"><text:span text:style-name="T5"/></text:p>
      <text:p text:style-name="P3"><draw:frame text:anchor-type="paragraph" draw:z-index="42" draw:name="Marco de texto 34" draw:style-name="gr1" draw:text-style-name="P24" svg:width="12.415cm" svg:height="10.551cm" svg:x="0.43cm" svg:y="0.155cm"><draw:text-box><text:p text:style-name="P22"><text:span text:style-name="T43"><text:s/></text:span><text:span text:style-name="T43">1 <text:s/></text:span><text:span text:style-name="T44">public</text:span><text:span text:style-name="T45"> </text:span><text:span text:style-name="T44">class</text:span><text:span text:style-name="T46"> FindInMatrixUsingReturn</text:span><text:span text:style-name="T45"> </text:span><text:span text:style-name="T49">{</text:span></text:p><text:p text:style-name="P22"><text:span text:style-name="T43"><text:s/></text:span><text:span text:style-name="T43">2 <text:s/></text:span><text:span text:style-name="T45"><text:s text:c="4"/></text:span><text:span text:style-name="T44">private</text:span><text:span text:style-name="T45"> </text:span><text:span text:style-name="T44">static</text:span><text:span text:style-name="T45"> </text:span><text:span text:style-name="T44">int</text:span><text:span text:style-name="T47">[]</text:span><text:span text:style-name="T45"> </text:span><text:span text:style-name="T46">searchForValue</text:span><text:span text:style-name="T49">(</text:span><text:span text:style-name="T44">int</text:span><text:span text:style-name="T47">[][]</text:span><text:span text:style-name="T45"> </text:span><text:span text:style-name="T46">list</text:span><text:span text:style-name="T49">,</text:span><text:span text:style-name="T45"> </text:span><text:span text:style-name="T44">int</text:span><text:span text:style-name="T45"> </text:span><text:span text:style-name="T46">v</text:span><text:span text:style-name="T49">)</text:span><text:span text:style-name="T45"> </text:span><text:span text:style-name="T49">{</text:span></text:p><text:p text:style-name="P22"><text:span text:style-name="T43"><text:s/></text:span><text:span text:style-name="T43">3 <text:s/></text:span><text:span text:style-name="T45"><text:s text:c="8"/></text:span><text:span text:style-name="T44">for</text:span><text:span text:style-name="T45"> </text:span><text:span text:style-name="T49">(</text:span><text:span text:style-name="T44">int</text:span><text:span text:style-name="T45"> </text:span><text:span text:style-name="T46">i</text:span><text:span text:style-name="T45"> </text:span><text:span text:style-name="T47">=</text:span><text:span text:style-name="T45"> </text:span><text:span text:style-name="T48">0</text:span><text:span text:style-name="T49">;</text:span><text:span text:style-name="T45"> </text:span><text:span text:style-name="T46">i</text:span><text:span text:style-name="T45"> </text:span><text:span text:style-name="T47">&lt;</text:span><text:span text:style-name="T45"> </text:span><text:span text:style-name="T46">list</text:span><text:span text:style-name="T49">.</text:span><text:span text:style-name="T51">length</text:span><text:span text:style-name="T49">;</text:span><text:span text:style-name="T45"> </text:span><text:span text:style-name="T46">i</text:span><text:span text:style-name="T47">++</text:span><text:span text:style-name="T49">)</text:span><text:span text:style-name="T45"> </text:span><text:span text:style-name="T49">{</text:span></text:p><text:p text:style-name="P22"><text:span text:style-name="T43"><text:s/></text:span><text:span text:style-name="T43">4 <text:s/></text:span><text:span text:style-name="T45"><text:s text:c="12"/></text:span><text:span text:style-name="T44">for</text:span><text:span text:style-name="T45"> </text:span><text:span text:style-name="T49">(</text:span><text:span text:style-name="T44">int</text:span><text:span text:style-name="T45"> </text:span><text:span text:style-name="T46">j</text:span><text:span text:style-name="T45"> </text:span><text:span text:style-name="T47">=</text:span><text:span text:style-name="T45"> </text:span><text:span text:style-name="T48">0</text:span><text:span text:style-name="T49">;</text:span><text:span text:style-name="T45"> </text:span><text:span text:style-name="T46">j</text:span><text:span text:style-name="T45"> </text:span><text:span text:style-name="T47">&lt;</text:span><text:span text:style-name="T45"> </text:span><text:span text:style-name="T46">list</text:span><text:span text:style-name="T47">[</text:span><text:span text:style-name="T46">i</text:span><text:span text:style-name="T47">]</text:span><text:span text:style-name="T49">.</text:span><text:span text:style-name="T51">length</text:span><text:span text:style-name="T49">;</text:span><text:span text:style-name="T45"> </text:span><text:span text:style-name="T46">j</text:span><text:span text:style-name="T47">++</text:span><text:span text:style-name="T49">)</text:span><text:span text:style-name="T45"> </text:span><text:span text:style-name="T49">{</text:span></text:p><text:p text:style-name="P22"><text:span text:style-name="T43"><text:s/></text:span><text:span text:style-name="T43">5 <text:s/></text:span><text:span text:style-name="T45"><text:s text:c="16"/></text:span><text:span text:style-name="T44">if</text:span><text:span text:style-name="T45"> </text:span><text:span text:style-name="T49">(</text:span><text:span text:style-name="T46">list</text:span><text:span text:style-name="T47">[</text:span><text:span text:style-name="T46">i</text:span><text:span text:style-name="T47">][</text:span><text:span text:style-name="T46">j</text:span><text:span text:style-name="T47">]</text:span><text:span text:style-name="T45"> </text:span><text:span text:style-name="T47">==</text:span><text:span text:style-name="T45"> </text:span><text:span text:style-name="T46">v</text:span><text:span text:style-name="T49">)</text:span><text:span text:style-name="T45"> </text:span><text:span text:style-name="T49">{</text:span></text:p><text:p text:style-name="P22"><text:span text:style-name="T43"><text:s/></text:span><text:span text:style-name="T43">6 <text:s/></text:span><text:span text:style-name="T45"><text:s text:c="20"/></text:span><text:span text:style-name="T44">return</text:span><text:span text:style-name="T45"> </text:span><text:span text:style-name="T44">new</text:span><text:span text:style-name="T45"> </text:span><text:span text:style-name="T44">int</text:span><text:span text:style-name="T47">[]</text:span><text:span text:style-name="T45"> </text:span><text:span text:style-name="T49">{</text:span><text:span text:style-name="T46">i</text:span><text:span text:style-name="T49">,</text:span><text:span text:style-name="T45"> </text:span><text:span text:style-name="T46">j</text:span><text:span text:style-name="T49">};</text:span></text:p><text:p text:style-name="P22"><text:span text:style-name="T43"><text:s/></text:span><text:span text:style-name="T43">7 <text:s/></text:span><text:span text:style-name="T45"><text:s text:c="16"/></text:span><text:span text:style-name="T49">}</text:span></text:p><text:p text:style-name="P22"><text:span text:style-name="T43"><text:s/></text:span><text:span text:style-name="T43">8 <text:s/></text:span><text:span text:style-name="T45"><text:s text:c="12"/></text:span><text:span text:style-name="T49">}</text:span></text:p><text:p text:style-name="P22"><text:span text:style-name="T43"><text:s/></text:span><text:span text:style-name="T43">9 <text:s/></text:span><text:span text:style-name="T45"><text:s text:c="8"/></text:span><text:span text:style-name="T49">}</text:span></text:p><text:p text:style-name="P22"><text:span text:style-name="T43">10 <text:s/></text:span><text:span text:style-name="T45"><text:s text:c="8"/></text:span><text:span text:style-name="T44">return</text:span><text:span text:style-name="T45"> </text:span><text:span text:style-name="T44">null</text:span><text:span text:style-name="T49">;</text:span></text:p><text:p text:style-name="P22"><text:span text:style-name="T43">11 <text:s/></text:span><text:span text:style-name="T45"><text:s text:c="4"/></text:span><text:span text:style-name="T49">}</text:span></text:p><text:p text:style-name="P23"><text:span text:style-name="T43">12 <text:s/></text:span></text:p><text:p text:style-name="P22"><text:span text:style-name="T43">13 <text:s/></text:span><text:span text:style-name="T45"><text:s text:c="4"/></text:span><text:span text:style-name="T44">public</text:span><text:span text:style-name="T45"> </text:span><text:span text:style-name="T44">static</text:span><text:span text:style-name="T45"> </text:span><text:span text:style-name="T44">void</text:span><text:span text:style-name="T45"> </text:span><text:span text:style-name="T46">main</text:span><text:span text:style-name="T49">(</text:span><text:span text:style-name="T46">String</text:span><text:span text:style-name="T47">[]</text:span><text:span text:style-name="T45"> </text:span><text:span text:style-name="T46">args</text:span><text:span text:style-name="T49">)</text:span><text:span text:style-name="T45"> </text:span><text:span text:style-name="T49">{</text:span></text:p><text:p text:style-name="P22"><text:span text:style-name="T43">14 <text:s/></text:span><text:span text:style-name="T45"><text:s text:c="8"/></text:span><text:span text:style-name="T44">int</text:span><text:span text:style-name="T47">[][]</text:span><text:span text:style-name="T45"> </text:span><text:span text:style-name="T46">list</text:span><text:span text:style-name="T45"> </text:span><text:span text:style-name="T47">=</text:span><text:span text:style-name="T45"> </text:span><text:span text:style-name="T49">{{</text:span><text:span text:style-name="T48">1</text:span><text:span text:style-name="T49">,</text:span><text:span text:style-name="T45"> </text:span><text:span text:style-name="T48">13</text:span><text:span text:style-name="T49">},</text:span><text:span text:style-name="T45"> </text:span><text:span text:style-name="T49">{</text:span><text:span text:style-name="T48">5</text:span><text:span text:style-name="T49">,</text:span><text:span text:style-name="T45"> </text:span><text:span text:style-name="T48">2</text:span><text:span text:style-name="T49">},</text:span><text:span text:style-name="T45"> </text:span><text:span text:style-name="T49">{</text:span><text:span text:style-name="T48">2</text:span><text:span text:style-name="T49">,</text:span><text:span text:style-name="T45"> </text:span><text:span text:style-name="T48">2</text:span><text:span text:style-name="T49">}};</text:span></text:p><text:p text:style-name="P22"><text:span text:style-name="T43">15 <text:s/></text:span><text:span text:style-name="T45"><text:s text:c="8"/></text:span><text:span text:style-name="T44">int</text:span><text:span text:style-name="T45"> </text:span><text:span text:style-name="T46">searchValue</text:span><text:span text:style-name="T45"> </text:span><text:span text:style-name="T47">=</text:span><text:span text:style-name="T45"> </text:span><text:span text:style-name="T48">2</text:span><text:span text:style-name="T49">;</text:span></text:p><text:p text:style-name="P23"><text:span text:style-name="T43">16 <text:s/></text:span></text:p><text:p text:style-name="P22"><text:span text:style-name="T43">17 <text:s/></text:span><text:span text:style-name="T45"><text:s text:c="8"/></text:span><text:span text:style-name="T44">int</text:span><text:span text:style-name="T47">[]</text:span><text:span text:style-name="T45"> </text:span><text:span text:style-name="T46">results</text:span><text:span text:style-name="T45"> </text:span><text:span text:style-name="T47">=</text:span><text:span text:style-name="T45"> </text:span><text:span text:style-name="T46">searchForValue</text:span><text:span text:style-name="T49">(</text:span><text:span text:style-name="T46">list</text:span><text:span text:style-name="T49">,</text:span><text:span text:style-name="T45"> </text:span><text:span text:style-name="T46">searchValue</text:span><text:span text:style-name="T49">);</text:span></text:p><text:p text:style-name="P23"><text:span text:style-name="T43">18 <text:s/></text:span></text:p><text:p text:style-name="P22"><text:span text:style-name="T43">19 <text:s/></text:span><text:span text:style-name="T45"><text:s text:c="8"/></text:span><text:span text:style-name="T44">if</text:span><text:span text:style-name="T45"> </text:span><text:span text:style-name="T49">(</text:span><text:span text:style-name="T46">results</text:span><text:span text:style-name="T45"> </text:span><text:span text:style-name="T47">==</text:span><text:span text:style-name="T45"> </text:span><text:span text:style-name="T44">null</text:span><text:span text:style-name="T49">)</text:span><text:span text:style-name="T45"> </text:span><text:span text:style-name="T49">{</text:span></text:p><text:p text:style-name="P22"><text:span text:style-name="T43">20 <text:s/></text:span><text:span text:style-name="T45"><text:s text:c="12"/></text:span><text:span text:style-name="T46">System</text:span><text:span text:style-name="T49">.</text:span><text:span text:style-name="T51">out</text:span><text:span text:style-name="T49">.</text:span><text:span text:style-name="T51">println</text:span><text:span text:style-name="T49">(</text:span><text:span text:style-name="T53">"Value "</text:span><text:span text:style-name="T45"> </text:span><text:span text:style-name="T47">+</text:span><text:span text:style-name="T45"> </text:span><text:span text:style-name="T46">searchValue</text:span><text:span text:style-name="T45"> </text:span><text:span text:style-name="T47">+</text:span><text:span text:style-name="T45"> </text:span><text:span text:style-name="T53">" not found"</text:span><text:span text:style-name="T49">);</text:span></text:p><text:p text:style-name="P22"><text:span text:style-name="T43">21 <text:s/></text:span><text:span text:style-name="T45"><text:s text:c="8"/></text:span><text:span text:style-name="T49">}</text:span><text:span text:style-name="T45"> </text:span><text:span text:style-name="T44">else</text:span><text:span text:style-name="T45"> </text:span><text:span text:style-name="T49">{</text:span></text:p><text:p text:style-name="P22"><text:span text:style-name="T43">22 <text:s/></text:span><text:span text:style-name="T45"><text:s text:c="12"/></text:span><text:span text:style-name="T46">System</text:span><text:span text:style-name="T49">.</text:span><text:span text:style-name="T51">out</text:span><text:span text:style-name="T49">.</text:span><text:span text:style-name="T51">println</text:span><text:span text:style-name="T49">(</text:span><text:span text:style-name="T53">"Value "</text:span><text:span text:style-name="T45"> </text:span><text:span text:style-name="T47">+</text:span><text:span text:style-name="T45"> </text:span><text:span text:style-name="T46">searchValue</text:span><text:span text:style-name="T45"> </text:span><text:span text:style-name="T47">+</text:span><text:span text:style-name="T45"> </text:span><text:span text:style-name="T53">" found at: ("</text:span><text:span text:style-name="T45"> </text:span><text:span text:style-name="T47">+</text:span></text:p><text:p text:style-name="P22"><text:span text:style-name="T43">23 <text:s/></text:span><text:span text:style-name="T45"><text:s text:c="20"/></text:span><text:span text:style-name="T46">results</text:span><text:span text:style-name="T47">[</text:span><text:span text:style-name="T48">0</text:span><text:span text:style-name="T47">]</text:span><text:span text:style-name="T45"> </text:span><text:span text:style-name="T47">+</text:span><text:span text:style-name="T45"> </text:span><text:span text:style-name="T53">","</text:span><text:span text:style-name="T45"> </text:span><text:span text:style-name="T47">+</text:span><text:span text:style-name="T45"> </text:span><text:span text:style-name="T46">results</text:span><text:span text:style-name="T47">[</text:span><text:span text:style-name="T48">1</text:span><text:span text:style-name="T47">]</text:span><text:span text:style-name="T45"> </text:span><text:span text:style-name="T47">+</text:span><text:span text:style-name="T45"> </text:span><text:span text:style-name="T53">")"</text:span><text:span text:style-name="T49">);</text:span></text:p><text:p text:style-name="P22"><text:span text:style-name="T43">24 <text:s/></text:span><text:span text:style-name="T45"><text:s text:c="8"/></text:span><text:span text:style-name="T49">}</text:span></text:p><text:p text:style-name="P22"><text:span text:style-name="T43">25 <text:s/></text:span><text:span text:style-name="T45"><text:s text:c="4"/></text:span><text:span text:style-name="T49">}</text:span></text:p><text:p text:style-name="P22"><text:span text:style-name="T43">26 <text:s/></text:span><text:span text:style-name="T49">}</text:span></text:p></draw:text-box></draw:frame><text:span text:style-name="T5"/></text:p>
      <text:p text:style-name="P3"><text:span text:style-name="T15">código inalcanzable</text:span><text:span text:style-name="T5">: Un aspecto de </text:span><text:span text:style-name="T20">break</text:span><text:span text:style-name="T5">, </text:span><text:span text:style-name="T20">continu</text:span><text:span text:style-name="T26">e</text:span><text:span text:style-name="T5"> y </text:span><text:span text:style-name="T20">return</text:span><text:span text:style-name="T5"> a tener en cuenta es que cualquier código colocado inmediatamente después de ellos en el mismo bloque se considera inalcanzable y no se compilará. Por ejemplo:</text:span></text:p>
      <text:p text:style-name="P3"><text:span text:style-name="T5"/></text:p>
      <text:p text:style-name="P3"><draw:frame text:anchor-type="paragraph" draw:z-index="43" draw:name="Marco de texto 35" draw:style-name="gr1" draw:text-style-name="P24" svg:width="12.415cm" svg:height="3.248cm" svg:x="0.43cm" svg:y="0.155cm"><draw:text-box><text:p text:style-name="P22"><text:span text:style-name="T43">1 <text:s/></text:span><text:span text:style-name="T44">int</text:span><text:span text:style-name="T45"> </text:span><text:span text:style-name="T46">checkDate</text:span><text:span text:style-name="T45"> </text:span><text:span text:style-name="T47">=</text:span><text:span text:style-name="T45"> </text:span><text:span text:style-name="T48">0</text:span><text:span text:style-name="T49">;</text:span></text:p><text:p text:style-name="P22"><text:span text:style-name="T43">2 <text:s/></text:span><text:span text:style-name="T44">while</text:span><text:span text:style-name="T45"> </text:span><text:span text:style-name="T49">(</text:span><text:span text:style-name="T46">checkDate</text:span><text:span text:style-name="T45"> </text:span><text:span text:style-name="T47">&lt;</text:span><text:span text:style-name="T45"> </text:span><text:span text:style-name="T48">10</text:span><text:span text:style-name="T49">)</text:span><text:span text:style-name="T45"> </text:span><text:span text:style-name="T49">{</text:span></text:p><text:p text:style-name="P22"><text:span text:style-name="T43">3 <text:s/></text:span><text:span text:style-name="T45"><text:s text:c="4"/></text:span><text:span text:style-name="T46">checkDate</text:span><text:span text:style-name="T47">++</text:span><text:span text:style-name="T49">;</text:span></text:p><text:p text:style-name="P22"><text:span text:style-name="T43">4 <text:s/></text:span><text:span text:style-name="T45"><text:s text:c="4"/></text:span><text:span text:style-name="T44">if</text:span><text:span text:style-name="T45"> </text:span><text:span text:style-name="T49">(</text:span><text:span text:style-name="T46">checkDate</text:span><text:span text:style-name="T45"> </text:span><text:span text:style-name="T47">&gt;</text:span><text:span text:style-name="T45"> </text:span><text:span text:style-name="T48">100</text:span><text:span text:style-name="T49">)</text:span><text:span text:style-name="T45"> </text:span><text:span text:style-name="T49">{</text:span></text:p><text:p text:style-name="P22"><text:span text:style-name="T43">5 <text:s/></text:span><text:span text:style-name="T45"><text:s text:c="8"/></text:span><text:span text:style-name="T44">break</text:span><text:span text:style-name="T49">;</text:span></text:p><text:p text:style-name="P22"><text:span text:style-name="T43">6 <text:s/></text:span><text:span text:style-name="T45"><text:s text:c="8"/></text:span><text:span text:style-name="T46">checkDate</text:span><text:span text:style-name="T47">++</text:span><text:span text:style-name="T49">;</text:span><text:span text:style-name="T45"> </text:span><text:span text:style-name="T52">// no se compilar por considerarse código inalcanzable</text:span></text:p><text:p text:style-name="P22"><text:span text:style-name="T43">7 <text:s/></text:span><text:span text:style-name="T45"><text:s text:c="4"/></text:span><text:span text:style-name="T49">}</text:span></text:p><text:p text:style-name="P22"><text:span text:style-name="T43">8 <text:s/></text:span><text:span text:style-name="T49">}</text:span></text:p></draw:text-box></draw:frame><text:span text:style-name="T5"/></text:p>
      <text:p text:style-name="P3"><text:span text:style-name="T5"/></text:p>
      <text:p text:style-name="P3"><draw:frame text:anchor-type="paragraph" draw:z-index="44" draw:name="Marco de texto 36" draw:style-name="gr1" draw:text-style-name="P24" svg:width="12.415cm" svg:height="5.682cm" svg:x="0.43cm" svg:y="0.155cm"><draw:text-box><text:p text:style-name="P22"><text:span text:style-name="T43"><text:s/></text:span><text:span text:style-name="T43">1 <text:s/></text:span><text:span text:style-name="T44">int</text:span><text:span text:style-name="T45"> </text:span><text:span text:style-name="T46">minute</text:span><text:span text:style-name="T45"> </text:span><text:span text:style-name="T47">=</text:span><text:span text:style-name="T45"> </text:span><text:span text:style-name="T48">1</text:span><text:span text:style-name="T49">;</text:span></text:p><text:p text:style-name="P22"><text:span text:style-name="T43"><text:s/></text:span><text:span text:style-name="T43">2 <text:s/></text:span><text:span text:style-name="T50">WATCH</text:span><text:span text:style-name="T49">:</text:span><text:span text:style-name="T45"> </text:span><text:span text:style-name="T44">while</text:span><text:span text:style-name="T45"> </text:span><text:span text:style-name="T49">(</text:span><text:span text:style-name="T46">minute</text:span><text:span text:style-name="T45"> </text:span><text:span text:style-name="T47">&gt;</text:span><text:span text:style-name="T45"> </text:span><text:span text:style-name="T48">2</text:span><text:span text:style-name="T49">)</text:span><text:span text:style-name="T45"> </text:span><text:span text:style-name="T49">{</text:span></text:p><text:p text:style-name="P22"><text:span text:style-name="T43"><text:s/></text:span><text:span text:style-name="T43">3 <text:s/></text:span><text:span text:style-name="T45"><text:s text:c="4"/></text:span><text:span text:style-name="T44">if</text:span><text:span text:style-name="T45"> </text:span><text:span text:style-name="T49">(</text:span><text:span text:style-name="T46">minute</text:span><text:span text:style-name="T47">++</text:span><text:span text:style-name="T45"> </text:span><text:span text:style-name="T47">&gt;</text:span><text:span text:style-name="T45"> </text:span><text:span text:style-name="T48">2</text:span><text:span text:style-name="T49">)</text:span><text:span text:style-name="T45"> </text:span><text:span text:style-name="T49">{</text:span></text:p><text:p text:style-name="P22"><text:span text:style-name="T43"><text:s/></text:span><text:span text:style-name="T43">4 <text:s/></text:span><text:span text:style-name="T45"><text:s text:c="8"/></text:span><text:span text:style-name="T44">continue</text:span><text:span text:style-name="T45"> </text:span><text:span text:style-name="T46">WATCH</text:span><text:span text:style-name="T49">;</text:span></text:p><text:p text:style-name="P22"><text:span text:style-name="T43"><text:s/></text:span><text:span text:style-name="T43">5 <text:s/></text:span><text:span text:style-name="T45"><text:s text:c="8"/></text:span><text:span text:style-name="T46">System</text:span><text:span text:style-name="T49">.</text:span><text:span text:style-name="T51">out</text:span><text:span text:style-name="T49">.</text:span><text:span text:style-name="T51">print</text:span><text:span text:style-name="T49">(</text:span><text:span text:style-name="T46">minute</text:span><text:span text:style-name="T49">);</text:span><text:span text:style-name="T45"> </text:span><text:span text:style-name="T52">// no se compilar por considerarse código inalcanzable</text:span></text:p><text:p text:style-name="P22"><text:span text:style-name="T43"><text:s/></text:span><text:span text:style-name="T43">6 <text:s/></text:span><text:span text:style-name="T45"><text:s text:c="4"/></text:span><text:span text:style-name="T49">}</text:span></text:p><text:p text:style-name="P22"><text:span text:style-name="T43"><text:s/></text:span><text:span text:style-name="T43">7 <text:s/></text:span><text:span text:style-name="T49">}</text:span></text:p><text:p text:style-name="P23"><text:span text:style-name="T43"><text:s/></text:span><text:span text:style-name="T43">8 <text:s/></text:span></text:p><text:p text:style-name="P22"><text:span text:style-name="T43"><text:s/></text:span><text:span text:style-name="T43">9 <text:s/></text:span><text:span text:style-name="T44">int</text:span><text:span text:style-name="T45"> </text:span><text:span text:style-name="T46">hour</text:span><text:span text:style-name="T45"> </text:span><text:span text:style-name="T47">=</text:span><text:span text:style-name="T45"> </text:span><text:span text:style-name="T48">2</text:span><text:span text:style-name="T49">;</text:span></text:p><text:p text:style-name="P22"><text:span text:style-name="T43">10 <text:s/></text:span><text:span text:style-name="T44">switch</text:span><text:span text:style-name="T45"> </text:span><text:span text:style-name="T49">(</text:span><text:span text:style-name="T46">hour</text:span><text:span text:style-name="T49">)</text:span><text:span text:style-name="T45"> </text:span><text:span text:style-name="T49">{</text:span></text:p><text:p text:style-name="P22"><text:span text:style-name="T43">11 <text:s/></text:span><text:span text:style-name="T45"><text:s text:c="4"/></text:span><text:span text:style-name="T44">case</text:span><text:span text:style-name="T45"> </text:span><text:span text:style-name="T48">1</text:span><text:span text:style-name="T49">:</text:span><text:span text:style-name="T45"> </text:span><text:span text:style-name="T44">return</text:span><text:span text:style-name="T49">;</text:span><text:span text:style-name="T45"> </text:span><text:span text:style-name="T46">hour</text:span><text:span text:style-name="T47">++</text:span><text:span text:style-name="T49">;</text:span><text:span text:style-name="T45"> </text:span><text:span text:style-name="T52">// no se compilar por considerarse codigo inalcanzable</text:span></text:p><text:p text:style-name="P22"><text:span text:style-name="T43">12 <text:s/></text:span><text:span text:style-name="T45"><text:s text:c="4"/></text:span><text:span text:style-name="T44">case</text:span><text:span text:style-name="T45"> </text:span><text:span text:style-name="T48">2</text:span><text:span text:style-name="T49">:</text:span></text:p><text:p text:style-name="P22"><text:span text:style-name="T43">13 <text:s/></text:span><text:span text:style-name="T49">}</text:span></text:p></draw:text-box></draw:frame><text:span text:style-name="T5"/></text:p>
      <text:p text:style-name="P3"><text:span text:style-name="T5"/></text:p>
      <text:p text:style-name="P3"><draw:frame draw:style-name="fr1" draw:name="Imagen10" text:anchor-type="char" svg:width="12.555cm" svg:height="3.425cm" draw:z-index="45"><draw:image xlink:href="Pictures/10000000000002C7000000C208948482.jpg" xlink:type="simple" xlink:show="embed" xlink:actuate="onLoad" draw:mime-type="image/jpeg"/></draw:frame><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9T19:32:37.841007883</dc:date>
    <meta:editing-duration>PT17H1M22S</meta:editing-duration>
    <meta:editing-cycles>80</meta:editing-cycles>
    <meta:generator>LibreOffice/24.2.7.2$Linux_X86_64 LibreOffice_project/420$Build-2</meta:generator>
    <meta:document-statistic meta:table-count="0" meta:image-count="10" meta:object-count="0" meta:page-count="8" meta:paragraph-count="79" meta:word-count="1749" meta:character-count="10496" meta:non-whitespace-character-count="8821"/>
  </office:meta>
</office:document-meta>
</file>